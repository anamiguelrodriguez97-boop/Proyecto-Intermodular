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>
      <style:text-properties fo:font-weight="bold"/>
    </style:style>
    <style:style style:name="P6" style:family="paragraph" style:parent-style-name="Text_20_body" style:list-style-name="L3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ódulo: Lenguajes de Marcas y Sistemas de Gestión de</text:p>
      <text:p text:style-name="Standard">Información (0373)</text:p>
      <text:p text:style-name="Standard"/>
      <text:p text:style-name="Standard">¿Qué se te pide en este módulo dentro del Proyecto Intermodular?</text:p>
      <text:p text:style-name="Standard">En este módulo vas a crear una parte muy habitual en proyectos reales: gestión y</text:p>
      <text:p text:style-name="Standard">validación de información estructurada.</text:p>
      <text:p text:style-name="Standard">Dentro del Proyecto Intermodular, tu objetivo será:</text:p>
      <text:p text:style-name="Standard">● Diseñar un XML que represente datos reales de tu aplicación (por ejemplo:</text:p>
      <text:p text:style-name="Standard">usuarios, productos, pedidos, reservas, informes, exportaciones...).</text:p>
      <text:p text:style-name="Standard">● Diseñar un XSD para validar ese XML.</text:p>
      <text:p text:style-name="Standard">● Validar correctamente el XML con el XSD y dejar evidencia de que funciona.</text:p>
      <text:p text:style-name="Standard">● Integrarlo con el proyecto: que ese XML tenga sentido y esté conectado con</text:p>
      <text:p text:style-name="Standard">tu aplicación y tu base de datos (aunque sea como “exportación/importación”</text:p>
      <text:p text:style-name="Standard">o “documentación de datos”).</text:p>
      <text:p text:style-name="Standard"/>
      <text:p text:style-name="Standard">¿Qué debe incluir tu trabajo?</text:p>
      <text:p text:style-name="Standard">1. Un XML “real” del proyecto</text:p>
      <text:p text:style-name="Standard">El XML debe representar información coherente con tu aplicación. Por ejemplo:</text:p>
      <text:p text:style-name="Standard">● Listado de productos</text:p>
      <text:p text:style-name="Standard"/>
      <text:p text:style-name="Standard">● Pedidos con sus líneas</text:p>
      <text:p text:style-name="Standard"/>
      <text:p text:style-name="Standard">● Reservas con fecha/hora/cliente</text:p>
      <text:p text:style-name="Standard"/>
      <text:p text:style-name="Standard">● Usuarios y roles</text:p>
      <text:p text:style-name="Standard"/>
      <text:p text:style-name="Standard">● Reporte de incidencias</text:p>
      <text:p text:style-name="Standard"/>
      <text:p text:style-name="Standard">● Catálogo / inventario</text:p>
      <text:p text:style-name="Standard"/>
      <text:p text:style-name="Standard">Debe tener:</text:p>
      <text:p text:style-name="Standard">● Estructura clara (jerarquía lógica)</text:p>
      <text:p text:style-name="Standard"/>
      <text:p text:style-name="Standard">● Datos realistas</text:p>
      <text:p text:style-name="Standard"/>
      <text:p text:style-name="Standard">● Identificadores coherentes</text:p>
      <text:p text:style-name="Standard"/>
      <text:p text:style-name="Standard">2. Un XSD que valide tu XML</text:p>
      <text:p text:style-name="Standard">Tendrás que crear un XSD que compruebe correctamente:</text:p>
      <text:p text:style-name="Standard">● Estructura (qué elementos pueden aparecer y dónde)</text:p>
      <text:p text:style-name="Standard"/>
      <text:p text:style-name="Standard">● Tipos de datos (string, integer, date, etc.)</text:p>
      <text:p text:style-name="Standard"/>
      <text:p text:style-name="Standard">● Restricciones (por ejemplo: valores mínimos, patrones, longitudes,</text:p>
      <text:p text:style-name="Standard">enumeraciones si aplica)</text:p>
      <text:p text:style-name="Standard"/>
      <text:p text:style-name="Standard">● Cardinalidades (mínimo/máximo de repeticiones)</text:p>
      <text:p text:style-name="Standard"/>
      <text:p text:style-name="Standard">El objetivo es que el XSD no sea “de adorno”: debe validar de verdad.</text:p>
      <text:p text:style-name="Standard"/>
      <text:p text:style-name="Standard">3. Validación demostrada</text:p>
      <text:p text:style-name="Standard">Debes aportar evidencia de validación:</text:p>
      <text:p text:style-name="Standard"><text:soft-page-break/>● Captura de pantalla de validación correcta o</text:p>
      <text:p text:style-name="Standard"/>
      <text:p text:style-name="Standard">● Log / salida / evidencia del IDE o herramienta utilizada</text:p>
      <text:p text:style-name="Standard"/>
      <text:p text:style-name="Standard">Y (opcional pero muy valorado):</text:p>
      <text:p text:style-name="Standard">● Un ejemplo de XML incorrecto que falle la validación, para demostrar que el</text:p>
      <text:p text:style-name="Standard">XSD controla.</text:p>
      <text:p text:style-name="Standard"/>
      <text:p text:style-name="Standard">4. Integración con el proyecto</text:p>
      <text:p text:style-name="Standard">Tienes varias formas válidas de integrarlo (elige una):</text:p>
      <text:p text:style-name="Standard">● Exportación de datos desde tu app/bbdd hacia XML</text:p>
      <text:p text:style-name="Standard"/>
      <text:p text:style-name="Standard">● Importación de XML a la app/bbdd (aunque sea parcial)</text:p>
      <text:p text:style-name="Standard"/>
      <text:p text:style-name="Standard">● XML como formato de intercambio / reporte</text:p>
      <text:p text:style-name="Standard"/>
      <text:p text:style-name="Standard">● XML como configuración o estructura documental del sistema</text:p>
      <text:p text:style-name="Standard"/>
      <text:p text:style-name="Standard">Lo importante: que no sea un XML suelto sin relación con el proyecto.</text:p>
      <text:p text:style-name="Standard"/>
      <text:p text:style-name="Standard">Entregables</text:p>
      <text:p text:style-name="Standard">En tu repositorio GitHub deberás incluir una carpeta tipo /xml o /docs/xml con:</text:p>
      <text:p text:style-name="Standard">● datos.xml (o el nombre que corresponda)</text:p>
      <text:p text:style-name="Standard"/>
      <text:p text:style-name="Standard">● esquema.xsd</text:p>
      <text:p text:style-name="Standard"/>
      <text:p text:style-name="Standard">● Evidencia de validación (captura o log en /docs)</text:p>
      <text:p text:style-name="Standard"/>
      <text:p text:style-name="Standard">● README breve explicando:</text:p>
      <text:p text:style-name="Standard"/>
      <text:p text:style-name="Standard">○ Qué datos representa el XML</text:p>
      <text:p text:style-name="Standard"/>
      <text:p text:style-name="Standard">○ Cómo se valida</text:p>
      <text:p text:style-name="Standard"/>
      <text:p text:style-name="Standard">○ Cómo encaja dentro de tu proyecto</text:p>
      <text:p text:style-name="Standard"/>
      <text:p text:style-name="Standard">Rúbrica – Lenguajes de Marcas (0373)</text:p>
      <text:p text:style-name="Standard">Criterio Descripción Punto</text:p>
      <text:p text:style-name="Standard">s</text:p>
      <text:p text:style-name="Standard"/>
      <text:p text:style-name="Standard">Diseño del XML Estructura clara, coherente, datos realistas y bien</text:p>
      <text:p text:style-name="Standard"/>
      <text:p text:style-name="Standard">organizados</text:p>
      <text:p text:style-name="Standard"/>
      <text:p text:style-name="Standard">2,5</text:p>
      <text:p text:style-name="Standard"/>
      <text:p text:style-name="Standard">Diseño del XSD XSD correcto, bien estructurado, tipos adecuados 3</text:p>
      <text:p text:style-name="Standard"/>
      <text:p text:style-name="Standard">Restricciones y</text:p>
      <text:p text:style-name="Standard">validaciones</text:p>
      <text:p text:style-name="Standard"/>
      <text:p text:style-name="Standard">Cardinalidades, tipos, restricciones (mínimos,</text:p>
      <text:p text:style-name="Standard"><text:soft-page-break/>patrones, enumeraciones si aplica)</text:p>
      <text:p text:style-name="Standard"/>
      <text:p text:style-name="Standard">2</text:p>
      <text:p text:style-name="Standard"/>
      <text:p text:style-name="Standard">Evidencia de</text:p>
      <text:p text:style-name="Standard">validación</text:p>
      <text:p text:style-name="Standard"/>
      <text:p text:style-name="Standard">Se demuestra que valida correctamente (y</text:p>
      <text:p text:style-name="Standard">opcionalmente que falla cuando debe)</text:p>
      <text:p text:style-name="Standard"/>
      <text:p text:style-name="Standard">1,5</text:p>
      <text:p text:style-name="Standard"/>
      <text:p text:style-name="Standard">Integración con el</text:p>
      <text:p text:style-name="Standard">proyecto</text:p>
      <text:p text:style-name="Standard"/>
      <text:p text:style-name="Standard">Relación real con la aplicación/bbdd</text:p>
      <text:p text:style-name="Standard">(export/import/reporte/config)</text:p>
      <text:p text:style-name="Standard"/>
      <text:p text:style-name="Standard">0,5</text:p>
      <text:p text:style-name="Standard"/>
      <text:p text:style-name="Standard">Organización y</text:p>
      <text:p text:style-name="Standard">documentación</text:p>
      <text:p text:style-name="Standard"/>
      <text:p text:style-name="Standard">GitHub ordenado, nombres claros, README y</text:p>
      <text:p text:style-name="Standard">estructura</text:p>
      <text:p text:style-name="Standard"/>
      <text:p text:style-name="Standard">0,5</text:p>
      <text:p text:style-name="Standard"/>
      <text:p text:style-name="Standard">Total 10</text:p>
      <text:p text:style-name="Standard"/>
      <text:h text:style-name="Heading_20_2" text:outline-level="2">1. Idea de Integración (El "Por qué")</text:h>
      <text:p text:style-name="Text_20_body">Para que tu XML no sea "de adorno" (0,5 puntos de la rúbrica), te sugiero una de estas dos opciones para tu app Java:</text:p>
      <text:list text:style-name="L1">
        <text:list-item>
          <text:p text:style-name="P1"><text:span text:style-name="T1">Exportación de Reportes:</text:span> Un botón en tu app Java que genere un <text:span text:style-name="Source_20_Text">informe_ventas.xml</text:span> o <text:span text:style-name="Source_20_Text">listado_usuarios.xml</text:span>.</text:p>
        </text:list-item>
        <text:list-item>
          <text:p text:style-name="P1"><text:span text:style-name="T1">Carga de Configuración:</text:span> Un archivo <text:span text:style-name="Source_20_Text">config.xml</text:span> donde guardas los parámetros de conexión a la base de datos o preferencias del sistema.</text:p>
        </text:list-item>
      </text:list>
      <text:p text:style-name="Horizontal_20_Line"/>
      <text:h text:style-name="Heading_20_2" text:outline-level="2">2. El XML "Real": Ejemplo de un Catálogo de Productos</text:h>
      <text:p text:style-name="Text_20_body">Imagina que tu app es un sistema de gestión. Un XML coherente sería:</text:p>
      <text:p text:style-name="P2">XML</text:p>
      <text:p text:style-name="Preformatted_20_Text"><text:span text:style-name="Source_20_Text">&lt;?xml version="1.0" encoding="UTF-8"?&gt;</text:span></text:p>
      <text:p text:style-name="Preformatted_20_Text"><text:span text:style-name="Source_20_Text">&lt;inventario xmlns:xsi="http://www.w3.org/2001/XMLSchema-instance"</text:span></text:p>
      <text:p text:style-name="Preformatted_20_Text"><text:span text:style-name="Source_20_Text"><text:s text:c="12"/>xsi:noNamespaceSchemaLocation="esquema.xsd"&gt;</text:span></text:p>
      <text:p text:style-name="Preformatted_20_Text"><text:span text:style-name="Source_20_Text"><text:s text:c="4"/>&lt;producto id="P-001"&gt;</text:span></text:p>
      <text:p text:style-name="Preformatted_20_Text"><text:soft-page-break/><text:span text:style-name="Source_20_Text"><text:s text:c="8"/>&lt;nombre&gt;Teclado Mecánico RGB&lt;/nombre&gt;</text:span></text:p>
      <text:p text:style-name="Preformatted_20_Text"><text:span text:style-name="Source_20_Text"><text:s text:c="8"/>&lt;categoria&gt;Periféricos&lt;/categoria&gt;</text:span></text:p>
      <text:p text:style-name="Preformatted_20_Text"><text:span text:style-name="Source_20_Text"><text:s text:c="8"/>&lt;precio moneda="EUR"&gt;89.99&lt;/precio&gt;</text:span></text:p>
      <text:p text:style-name="Preformatted_20_Text"><text:span text:style-name="Source_20_Text"><text:s text:c="8"/>&lt;stock&gt;15&lt;/stock&gt;</text:span></text:p>
      <text:p text:style-name="Preformatted_20_Text"><text:span text:style-name="Source_20_Text"><text:s text:c="8"/>&lt;fecha_alta&gt;2024-03-15&lt;/fecha_alta&gt;</text:span></text:p>
      <text:p text:style-name="Preformatted_20_Text"><text:span text:style-name="Source_20_Text"><text:s text:c="4"/>&lt;/producto&gt;</text:span></text:p>
      <text:p text:style-name="Preformatted_20_Text"><text:span text:style-name="Source_20_Text"><text:s text:c="4"/>&lt;producto id="P-002"&gt;</text:span></text:p>
      <text:p text:style-name="Preformatted_20_Text"><text:span text:style-name="Source_20_Text"><text:s text:c="8"/>&lt;nombre&gt;Monitor 27" 4K&lt;/nombre&gt;</text:span></text:p>
      <text:p text:style-name="Preformatted_20_Text"><text:span text:style-name="Source_20_Text"><text:s text:c="8"/>&lt;categoria&gt;Monitores&lt;/categoria&gt;</text:span></text:p>
      <text:p text:style-name="Preformatted_20_Text"><text:span text:style-name="Source_20_Text"><text:s text:c="8"/>&lt;precio moneda="EUR"&gt;349.50&lt;/precio&gt;</text:span></text:p>
      <text:p text:style-name="Preformatted_20_Text"><text:span text:style-name="Source_20_Text"><text:s text:c="8"/>&lt;stock&gt;5&lt;/stock&gt;</text:span></text:p>
      <text:p text:style-name="Preformatted_20_Text"><text:span text:style-name="Source_20_Text"><text:s text:c="8"/>&lt;fecha_alta&gt;2024-01-10&lt;/fecha_alta&gt;</text:span></text:p>
      <text:p text:style-name="Preformatted_20_Text"><text:span text:style-name="Source_20_Text"><text:s text:c="4"/>&lt;/producto&gt;</text:span></text:p>
      <text:p text:style-name="P3"><text:span text:style-name="Source_20_Text">&lt;/inventario&gt;</text:span></text:p>
      <text:p text:style-name="Horizontal_20_Line"/>
      <text:h text:style-name="Heading_20_2" text:outline-level="2">3. El XSD: La "Aduana" de tus datos</text:h>
      <text:p text:style-name="Text_20_body">Para obtener los <text:span text:style-name="T1">3 puntos de diseño</text:span> y <text:span text:style-name="T1">2 puntos de restricciones</text:span>, tu XSD debe ser estricto. No uses solo <text:span text:style-name="Source_20_Text">string</text:span> para todo.</text:p>
      <text:list text:style-name="L2">
        <text:list-item>
          <text:p text:style-name="P4"><text:span text:style-name="T1">Tipos de datos:</text:span> Usa <text:span text:style-name="Source_20_Text">decimal</text:span> para precios e <text:span text:style-name="Source_20_Text">integer</text:span> para stock.</text:p>
        </text:list-item>
        <text:list-item>
          <text:p text:style-name="P4"><text:span text:style-name="T1">Restricciones (Facets):</text:span> El ID debe seguir un patrón (ej. Una 'P' seguida de 3 números).</text:p>
        </text:list-item>
        <text:list-item>
          <text:p text:style-name="P4"><text:span text:style-name="T1">Enumeraciones:</text:span> La categoría solo puede ser una de una lista cerrada.</text:p>
        </text:list-item>
      </text:list>
      <text:p text:style-name="P5">Ejemplo de restricción en el XSD:</text:p>
      <text:p text:style-name="P2">XML</text:p>
      <text:p text:style-name="Preformatted_20_Text"><text:span text:style-name="Source_20_Text">&lt;xs:simpleType name="tipoID"&gt;</text:span></text:p>
      <text:p text:style-name="Preformatted_20_Text"><text:span text:style-name="Source_20_Text"><text:s text:c="2"/>&lt;xs:restriction base="xs:string"&gt;</text:span></text:p>
      <text:p text:style-name="Preformatted_20_Text"><text:span text:style-name="Source_20_Text"><text:s text:c="4"/>&lt;xs:pattern value="P-[0-9]{3}"/&gt; &lt;/xs:restriction&gt;</text:span></text:p>
      <text:p text:style-name="Preformatted_20_Text"><text:span text:style-name="Source_20_Text">&lt;/xs:simpleType&gt;</text:span></text:p>
      <text:p text:style-name="Preformatted_20_Text"/>
      <text:p text:style-name="Preformatted_20_Text"><text:span text:style-name="Source_20_Text">&lt;xs:simpleType name="tipoCategoria"&gt;</text:span></text:p>
      <text:p text:style-name="Preformatted_20_Text"><text:span text:style-name="Source_20_Text"><text:s text:c="2"/>&lt;xs:restriction base="xs:string"&gt;</text:span></text:p>
      <text:p text:style-name="Preformatted_20_Text"><text:span text:style-name="Source_20_Text"><text:s text:c="4"/>&lt;xs:enumeration value="Periféricos"/&gt;</text:span></text:p>
      <text:p text:style-name="Preformatted_20_Text"><text:span text:style-name="Source_20_Text"><text:s text:c="4"/>&lt;xs:enumeration value="Monitores"/&gt;</text:span></text:p>
      <text:p text:style-name="Preformatted_20_Text"><text:span text:style-name="Source_20_Text"><text:s text:c="4"/>&lt;xs:enumeration value="Almacenamiento"/&gt;</text:span></text:p>
      <text:p text:style-name="Preformatted_20_Text"><text:span text:style-name="Source_20_Text"><text:s text:c="2"/>&lt;/xs:restriction&gt;</text:span></text:p>
      <text:p text:style-name="P3"><text:span text:style-name="Source_20_Text">&lt;/xs:simpleType&gt;</text:span></text:p>
      <text:p text:style-name="Horizontal_20_Line"/>
      <text:h text:style-name="Heading_20_2" text:outline-level="2">4. Evidencia de Validación (1,5 puntos)</text:h>
      <text:p text:style-name="Text_20_body">Para esta parte, te recomiendo usar <text:span text:style-name="T1">IntelliJ IDEA</text:span> o <text:span text:style-name="T1">Visual Studio Code</text:span>:</text:p>
      <text:list text:style-name="L3">
        <text:list-item>
          <text:p text:style-name="P6">Abre tu XML.</text:p>
        </text:list-item>
        <text:list-item>
          <text:p text:style-name="P6">Asócialo al XSD.</text:p>
        </text:list-item>
        <text:list-item>
          <text:p text:style-name="P6">Haz una captura donde se vea el check verde de "No errors found".</text:p>
        </text:list-item>
        <text:list-item>
          <text:p text:style-name="P6"><text:span text:style-name="T1">Tip Extra:</text:span> Haz otra captura provocando un error (ej. poniendo un precio con letras) y muestra cómo el IDE marca el error en rojo. Eso demuestra que tu XSD "vigila" de verdad.</text:p>
        </text:list-item>
      </text:list>
      <text:p text:style-name="Horizontal_20_Line"><text:soft-page-break/></text:p>
      <text:h text:style-name="Heading_20_2" text:outline-level="2">5. Organización en GitHub</text:h>
      <text:p text:style-name="Text_20_body">Tu estructura de carpetas debería verse así de limpia para asegurar el último <text:span text:style-name="T1">0,5 de organización</text:span>:</text:p>
      <text:p text:style-name="P2">Plaintext</text:p>
      <text:p text:style-name="Preformatted_20_Text"><text:span text:style-name="Source_20_Text">/docs/xml/</text:span></text:p>
      <text:p text:style-name="Preformatted_20_Text"><text:span text:style-name="Source_20_Text"><text:s text:c="2"/>├── esquema.xsd <text:s text:c="9"/>(El validador)</text:span></text:p>
      <text:p text:style-name="Preformatted_20_Text"><text:span text:style-name="Source_20_Text"><text:s text:c="2"/>├── datos.xml <text:s text:c="11"/>(Ejemplo correcto)</text:span></text:p>
      <text:p text:style-name="Preformatted_20_Text"><text:span text:style-name="Source_20_Text"><text:s text:c="2"/>├── datos_error.xml <text:s text:c="5"/>(Ejemplo con errores para la demo)</text:span></text:p>
      <text:p text:style-name="Preformatted_20_Text"><text:span text:style-name="Source_20_Text"><text:s text:c="2"/>├── evidencia_ok.png <text:s text:c="4"/>(Captura validando)</text:span></text:p>
      <text:p text:style-name="Preformatted_20_Text"><text:span text:style-name="Source_20_Text"><text:s text:c="2"/>├── evidencia_error.png <text:s/>(Captura fallando)</text:span></text:p>
      <text:p text:style-name="P3"><text:span text:style-name="Source_20_Text"><text:s text:c="2"/>└── README.md <text:s text:c="11"/>(Explicación del uso en la App Java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7:00:31.732082100</meta:creation-date>
    <dc:date>2026-03-19T17:05:21.283859300</dc:date>
    <meta:editing-duration>PT4M49S</meta:editing-duration>
    <meta:editing-cycles>1</meta:editing-cycles>
    <meta:document-statistic meta:table-count="0" meta:image-count="0" meta:object-count="0" meta:page-count="5" meta:paragraph-count="144" meta:word-count="832" meta:character-count="5811" meta:non-whitespace-character-count="4948"/>
    <meta:generator>LibreOffice/25.8.3.2$Windows_X86_64 LibreOffice_project/8ca8d55c161d602844f5428fa4b58097424e324e</meta:generator>
  </office:meta>
</office:document-meta>
</file>