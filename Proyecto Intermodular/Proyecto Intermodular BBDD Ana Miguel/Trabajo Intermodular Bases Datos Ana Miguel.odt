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1" style:family="paragraph" style:parent-style-name="Preformatted_20_Text">
      <style:paragraph-properties fo:margin-top="0cm" fo:margin-bottom="0cm" style:contextual-spacing="false" fo:line-height="114%"/>
    </style:style>
    <style:style style:name="P12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7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ódulo: Bases de Datos (0484)</text:p>
      <text:p text:style-name="Standard"/>
      <text:p text:style-name="Standard">¿Qué se te pide en este módulo dentro del Proyecto Intermodular?</text:p>
      <text:p text:style-name="Standard">En el módulo de Bases de Datos, tu objetivo será diseñar y construir la base de</text:p>
      <text:p text:style-name="Standard">datos real de tu aplicación.</text:p>
      <text:p text:style-name="Standard">No se trata solo de crear tablas sin sentido: tendrás que pensar qué datos necesita</text:p>
      <text:p text:style-name="Standard">tu aplicación, cómo se relacionan entre sí y cómo se van a usar desde el programa</text:p>
      <text:p text:style-name="Standard">que desarrolles en el módulo de Programación.</text:p>
      <text:p text:style-name="Standard">Tu trabajo en este módulo será clave, ya que sin una buena base de datos, la</text:p>
      <text:p text:style-name="Standard">aplicación no puede funcionar correctamente.</text:p>
      <text:p text:style-name="Standard"/>
      <text:p text:style-name="Standard">¿Qué debe incluir tu trabajo?</text:p>
      <text:p text:style-name="Standard">Tu proyecto de Bases de Datos debe incluir obligatoriamente:</text:p>
      <text:p text:style-name="Standard">1. Análisis de datos</text:p>
      <text:p text:style-name="Standard">Tendrás que identificar:</text:p>
      <text:p text:style-name="Standard">● Qué información maneja tu aplicación.</text:p>
      <text:p text:style-name="Standard"/>
      <text:p text:style-name="Standard">● Qué entidades existen (usuarios, productos, pedidos, reservas, etc.).</text:p>
      <text:p text:style-name="Standard"/>
      <text:p text:style-name="Standard">● Qué relaciones hay entre ellas.</text:p>
      <text:p text:style-name="Standard"/>
      <text:p text:style-name="Standard">2. Diagrama Entidad–Relación (E/R)</text:p>
      <text:p text:style-name="Standard">Deberás crear el diagrama E/R completo de tu base de datos, donde se vean</text:p>
      <text:p text:style-name="Standard">claramente:</text:p>
      <text:p text:style-name="Standard">● Entidades</text:p>
      <text:p text:style-name="Standard"/>
      <text:p text:style-name="Standard">● Atributos</text:p>
      <text:p text:style-name="Standard"/>
      <text:p text:style-name="Standard">● Claves primarias</text:p>
      <text:p text:style-name="Standard"/>
      <text:p text:style-name="Standard">● Claves foráneas</text:p>
      <text:p text:style-name="Standard"/>
      <text:p text:style-name="Standard">● Relaciones</text:p>
      <text:p text:style-name="Standard"/>
      <text:p text:style-name="Standard">● Cardinalidades</text:p>
      <text:p text:style-name="Standard"/>
      <text:p text:style-name="Standard">Este diagrama debe ser coherente con la funcionalidad real de tu aplicación.</text:p>
      <text:p text:style-name="Standard">3. Modelo relacional</text:p>
      <text:p text:style-name="Standard">A partir del diagrama E/R, tendrás que obtener el modelo relacional:</text:p>
      <text:p text:style-name="Standard">● Tablas</text:p>
      <text:p text:style-name="Standard"/>
      <text:p text:style-name="Standard">● Campos</text:p>
      <text:p text:style-name="Standard"/>
      <text:p text:style-name="Standard">● Tipos de datos</text:p>
      <text:p text:style-name="Standard"/>
      <text:p text:style-name="Standard">● Claves primarias</text:p>
      <text:p text:style-name="Standard"/>
      <text:p text:style-name="Standard">● Claves foráneas</text:p>
      <text:p text:style-name="Standard"/>
      <text:p text:style-name="Standard">● Restricciones</text:p>
      <text:p text:style-name="Standard"/>
      <text:p text:style-name="Standard">4. Creación de la base de datos</text:p>
      <text:p text:style-name="Standard"><text:soft-page-break/>Deberás:</text:p>
      <text:p text:style-name="Standard">● Crear las tablas en SQL.</text:p>
      <text:p text:style-name="Standard"/>
      <text:p text:style-name="Standard">● Insertar datos de ejemplo.</text:p>
      <text:p text:style-name="Standard"/>
      <text:p text:style-name="Standard">● Comprobar que todo funciona correctamente.</text:p>
      <text:p text:style-name="Standard"/>
      <text:p text:style-name="Standard">5. Consultas</text:p>
      <text:p text:style-name="Standard">Tendrás que incluir consultas reales que tengan sentido dentro de tu aplicación:</text:p>
      <text:p text:style-name="Standard">● SELECT con filtros</text:p>
      <text:p text:style-name="Standard"/>
      <text:p text:style-name="Standard">● JOIN entre tablas</text:p>
      <text:p text:style-name="Standard"/>
      <text:p text:style-name="Standard">● Búsquedas</text:p>
      <text:p text:style-name="Standard"/>
      <text:p text:style-name="Standard">● Listados</text:p>
      <text:p text:style-name="Standard"/>
      <text:p text:style-name="Standard">● etc.</text:p>
      <text:p text:style-name="Standard"/>
      <text:p text:style-name="Standard">6. Integración con el proyecto global</text:p>
      <text:p text:style-name="Standard">Tu base de datos debe estar pensada para que luego pueda ser utilizada desde el</text:p>
      <text:p text:style-name="Standard">módulo de Programación.</text:p>
      <text:p text:style-name="Standard">No se valora una base de datos aislada, sino una base de datos pensada para una</text:p>
      <text:p text:style-name="Standard">aplicación real.</text:p>
      <text:p text:style-name="Standard"/>
      <text:p text:style-name="Standard">Entregables</text:p>
      <text:p text:style-name="Standard">Para este módulo tendrás que entregar:</text:p>
      <text:p text:style-name="Standard">● Diagrama E/R (PDF o imagen).</text:p>
      <text:p text:style-name="Standard"/>
      <text:p text:style-name="Standard">● Modelo relacional.</text:p>
      <text:p text:style-name="Standard"/>
      <text:p text:style-name="Standard">● Script SQL de creación de tablas.</text:p>
      <text:p text:style-name="Standard"/>
      <text:p text:style-name="Standard">● Script SQL de inserción de datos.</text:p>
      <text:p text:style-name="Standard"/>
      <text:p text:style-name="Standard">● Script con consultas.</text:p>
      <text:p text:style-name="Standard"/>
      <text:p text:style-name="Standard">● Repositorio en GitHub con todo organizado.</text:p>
      <text:p text:style-name="Standard"/>
      <text:p text:style-name="Standard">● README explicando tu diseño.</text:p>
      <text:p text:style-name="Standard"/>
      <text:p text:style-name="Standard">Rúbrica – Bases de Datos (0484)</text:p>
      <text:p text:style-name="Standard">Criterio Descripción Punto</text:p>
      <text:p text:style-name="Standard">s</text:p>
      <text:p text:style-name="Standard"/>
      <text:p text:style-name="Standard">Análisis de datos Identificación correcta de entidades, atributos y</text:p>
      <text:p text:style-name="Standard"/>
      <text:p text:style-name="Standard">relaciones</text:p>
      <text:p text:style-name="Standard"/>
      <text:p text:style-name="Standard">2</text:p>
      <text:p text:style-name="Standard"/>
      <text:p text:style-name="Standard">Diagrama E/R Claridad, corrección, coherencia y</text:p>
      <text:p text:style-name="Standard"><text:soft-page-break/></text:p>
      <text:p text:style-name="Standard">cardinalidades</text:p>
      <text:p text:style-name="Standard"/>
      <text:p text:style-name="Standard">2</text:p>
      <text:p text:style-name="Standard"/>
      <text:p text:style-name="Standard">Modelo relacional Transformación correcta del E/R a tablas 2</text:p>
      <text:p text:style-name="Standard"/>
      <text:p text:style-name="Standard">Creación de la base de</text:p>
      <text:p text:style-name="Standard">datos</text:p>
      <text:p text:style-name="Standard"/>
      <text:p text:style-name="Standard">Tablas bien definidas, tipos de datos</text:p>
      <text:p text:style-name="Standard">adecuados, claves correctas</text:p>
      <text:p text:style-name="Standard"/>
      <text:p text:style-name="Standard">2</text:p>
      <text:p text:style-name="Standard"/>
      <text:p text:style-name="Standard">Consultas Consultas útiles, bien planteadas y funcionales 1,5</text:p>
      <text:p text:style-name="Standard">Integración con la</text:p>
      <text:p text:style-name="Standard">aplicación</text:p>
      <text:p text:style-name="Standard"/>
      <text:p text:style-name="Standard">Coherencia con el proyecto global 1</text:p>
      <text:p text:style-name="Standard"/>
      <text:p text:style-name="Standard">Organización y</text:p>
      <text:p text:style-name="Standard">documentación</text:p>
      <text:p text:style-name="Standard"/>
      <text:p text:style-name="Standard">GitHub, README, orden y claridad 1,5</text:p>
      <text:p text:style-name="Standard"/>
      <text:p text:style-name="Standard">Total 10</text:p>
      <text:p text:style-name="Standard"/>
      <text:p text:style-name="Standard"/>
      <text:h text:style-name="P1" text:outline-level="2">1. El Análisis de Datos (Identificación de Entidades)</text:h>
      <text:p text:style-name="P2">Antes de dibujar, hay que pensar. Como tu proyecto es en <text:span text:style-name="T1">Java</text:span>, cada tabla de tu base de datos se convertirá, casi con seguridad, en una <text:span text:style-name="T1">Clase (Entity)</text:span> en tu código.</text:p>
      <text:list text:style-name="L1">
        <text:list-item>
          <text:p text:style-name="P3"><text:span text:style-name="T1">Entidades Maestras:</text:span> Usuarios, Productos, Clientes (las que existen por sí solas).</text:p>
        </text:list-item>
        <text:list-item>
          <text:p text:style-name="P3"><text:span text:style-name="T1">Entidades de Transacción:</text:span> Pedidos, Reservas, Ventas (las que ocurren cuando las maestras interactúan).</text:p>
        </text:list-item>
      </text:list>
      <text:p text:style-name="Horizontal_20_Line"/>
      <text:h text:style-name="P4" text:outline-level="2">2. El Diagrama Entidad-Relación (E/R)</text:h>
      <text:p text:style-name="P2">Este es el plano de tu edificio. Para los 2 puntos de la rúbrica, asegúrate de marcar:</text:p>
      <text:list text:style-name="L2">
        <text:list-item>
          <text:p text:style-name="P5"><text:span text:style-name="T2">Claves Primarias (PK):</text:span><text:span text:style-name="T3"> Siempre usa un </text:span><text:span text:style-name="Source_20_Text"><text:span text:style-name="T3">id</text:span></text:span><text:span text:style-name="T3"> (preferiblemente autoincremental).</text:span></text:p>
        </text:list-item>
        <text:list-item>
          <text:p text:style-name="P6"><text:span text:style-name="T1">Cardinalidades:</text:span> ¿Un usuario puede tener muchos pedidos ($1:N$)? ¿Un producto puede estar en muchos pedidos y un pedido tener muchos productos ($N:M$)?</text:p>
        </text:list-item>
        <text:list-item>
          <text:p text:style-name="P5"><text:span text:style-name="T2">Atributos:</text:span><text:span text:style-name="T3"> No olvides los tipos (String -&gt; </text:span><text:span text:style-name="Source_20_Text"><text:span text:style-name="T3">VARCHAR</text:span></text:span><text:span text:style-name="T3">, Fecha -&gt; </text:span><text:span text:style-name="Source_20_Text"><text:span text:style-name="T3">DATE</text:span></text:span><text:span text:style-name="T3">, Precio -&gt; </text:span><text:span text:style-name="Source_20_Text"><text:span text:style-name="T3">DECIMAL</text:span></text:span><text:span text:style-name="T3">).</text:span></text:p>
        </text:list-item>
      </text:list>
      <text:p text:style-name="Horizontal_20_Line"/>
      <text:h text:style-name="P4" text:outline-level="2"><text:soft-page-break/>3. Modelo Relacional (Paso a tablas)</text:h>
      <text:p text:style-name="P2">Aquí traduces los rombos y elipses del E/R a una estructura de tablas.</text:p>
      <text:list text:style-name="L3">
        <text:list-item>
          <text:p text:style-name="P7"><text:span text:style-name="T2">Regla de oro:</text:span><text:span text:style-name="T3"> Las relaciones $N:M$ (Muchos a Muchos) generan una </text:span><text:span text:style-name="T2">tabla intermedia</text:span><text:span text:style-name="T3">. Por ejemplo: </text:span><text:span text:style-name="Source_20_Text"><text:span text:style-name="T3">Lineas_Pedido</text:span></text:span><text:span text:style-name="T3"> o </text:span><text:span text:style-name="Source_20_Text"><text:span text:style-name="T3">Citas_Medicas</text:span></text:span><text:span text:style-name="T3">.</text:span></text:p>
        </text:list-item>
        <text:list-item>
          <text:p text:style-name="P8"><text:span text:style-name="T1">Normalización:</text:span> Asegúrate de llegar al menos a la <text:span text:style-name="T1">3ª Forma Normal</text:span> para evitar redundancia (que no haya datos repetidos innecesariamente).</text:p>
        </text:list-item>
      </text:list>
      <text:p text:style-name="Horizontal_20_Line"/>
      <text:h text:style-name="P4" text:outline-level="2">4. El Script SQL: La hora del código</text:h>
      <text:p text:style-name="P9"><text:span text:style-name="T3">Tu archivo </text:span><text:span text:style-name="Source_20_Text"><text:span text:style-name="T3">script_creacion.sql</text:span></text:span><text:span text:style-name="T3"> debe estar impecable. Usa el estándar de MySQL o PostgreSQL:</text:span></text:p>
      <text:p text:style-name="P2">SQL</text:p>
      <text:p text:style-name="P10"><text:span text:style-name="Source_20_Text"><text:span text:style-name="T3">CREATE TABLE usuarios (</text:span></text:span></text:p>
      <text:p text:style-name="P10"><text:span text:style-name="Source_20_Text"><text:s text:c="4"/></text:span><text:span text:style-name="Source_20_Text"><text:span text:style-name="T3">id_usuario INT AUTO_INCREMENT PRIMARY KEY,</text:span></text:span></text:p>
      <text:p text:style-name="P10"><text:span text:style-name="Source_20_Text"><text:s text:c="4"/></text:span><text:span text:style-name="Source_20_Text"><text:span text:style-name="T3">username VARCHAR(50) NOT NULL UNIQUE,</text:span></text:span></text:p>
      <text:p text:style-name="P10"><text:span text:style-name="Source_20_Text"><text:s text:c="4"/></text:span><text:span text:style-name="Source_20_Text"><text:span text:style-name="T3">password VARCHAR(255) NOT NULL,</text:span></text:span></text:p>
      <text:p text:style-name="P10"><text:span text:style-name="Source_20_Text"><text:s text:c="4"/></text:span><text:span text:style-name="Source_20_Text"><text:span text:style-name="T3">email VARCHAR(100),</text:span></text:span></text:p>
      <text:p text:style-name="P10"><text:span text:style-name="Source_20_Text"><text:s text:c="4"/></text:span><text:span text:style-name="Source_20_Text"><text:span text:style-name="T3">fecha_registro TIMESTAMP DEFAULT CURRENT_TIMESTAMP</text:span></text:span></text:p>
      <text:p text:style-name="P11"><text:span text:style-name="Source_20_Text"><text:span text:style-name="T3">);</text:span></text:span></text:p>
      <text:p text:style-name="P11"/>
      <text:p text:style-name="P10"><text:span text:style-name="Source_20_Text"><text:span text:style-name="T3">CREATE TABLE productos (</text:span></text:span></text:p>
      <text:p text:style-name="P10"><text:span text:style-name="Source_20_Text"><text:s text:c="4"/></text:span><text:span text:style-name="Source_20_Text"><text:span text:style-name="T3">id_producto INT AUTO_INCREMENT PRIMARY KEY,</text:span></text:span></text:p>
      <text:p text:style-name="P10"><text:span text:style-name="Source_20_Text"><text:s text:c="4"/></text:span><text:span text:style-name="Source_20_Text"><text:span text:style-name="T3">nombre VARCHAR(100) NOT NULL,</text:span></text:span></text:p>
      <text:p text:style-name="P10"><text:span text:style-name="Source_20_Text"><text:s text:c="4"/></text:span><text:span text:style-name="Source_20_Text"><text:span text:style-name="T3">precio DECIMAL(10, 2) NOT NULL CHECK (precio &gt; 0),</text:span></text:span></text:p>
      <text:p text:style-name="P10"><text:span text:style-name="Source_20_Text"><text:s text:c="4"/></text:span><text:span text:style-name="Source_20_Text"><text:span text:style-name="T3">stock INT DEFAULT 0</text:span></text:span></text:p>
      <text:p text:style-name="P11"><text:span text:style-name="Source_20_Text"><text:span text:style-name="T3">);</text:span></text:span></text:p>
      <text:p text:style-name="P12"><text:span text:style-name="T2">Tip:</text:span><text:span text:style-name="T3"> El uso de </text:span><text:span text:style-name="Source_20_Text"><text:span text:style-name="T3">CHECK</text:span></text:span><text:span text:style-name="T3"> y </text:span><text:span text:style-name="Source_20_Text"><text:span text:style-name="T3">UNIQUE</text:span></text:span><text:span text:style-name="T3"> te dará puntos extra en "Restricciones".</text:span></text:p>
      <text:p text:style-name="Horizontal_20_Line"/>
      <text:h text:style-name="P4" text:outline-level="2">5. Consultas (SQL Realista)</text:h>
      <text:p text:style-name="P9"><text:span text:style-name="T3">No hagas solo un </text:span><text:span text:style-name="Source_20_Text"><text:span text:style-name="T3">SELECT * FROM usuarios</text:span></text:span><text:span text:style-name="T3">. Piensa en lo que tu app Java necesitará mostrar:</text:span></text:p>
      <text:list text:style-name="L4">
        <text:list-item>
          <text:p text:style-name="P13"><text:span text:style-name="T1">Búsqueda:</text:span> "Dime los productos con stock menor a 5".</text:p>
        </text:list-item>
        <text:list-item>
          <text:p text:style-name="P13"><text:span text:style-name="T1">JOIN:</text:span> "Dime el nombre del cliente y la fecha de todos los pedidos que superen los 100€".</text:p>
        </text:list-item>
        <text:list-item>
          <text:p text:style-name="P13"><text:span text:style-name="T1">Agregación:</text:span> "¿Cuál es el total de ventas del mes de marzo?".</text:p>
        </text:list-item>
      </text:list>
      <text:p text:style-name="Horizontal_20_Line"/>
      <text:h text:style-name="P4" text:outline-level="2">6. Integración con el Proyecto (Java + SQL)</text:h>
      <text:p text:style-name="P2">Aquí es donde conectas los puntos. En tu informe, debes explicar:</text:p>
      <text:list text:style-name="L5">
        <text:list-item>
          <text:p text:style-name="P14">Cómo se conecta Java a la BD (usando <text:span text:style-name="T1">JDBC</text:span> o un <text:span text:style-name="T1">ORM</text:span> como Hibernate).</text:p>
        </text:list-item>
        <text:list-item>
          <text:p text:style-name="P15"><text:soft-page-break/><text:span text:style-name="T3">Por qué elegiste esos tipos de datos (ej: usamos </text:span><text:span text:style-name="Source_20_Text"><text:span text:style-name="T3">DECIMAL</text:span></text:span><text:span text:style-name="T3"> para el dinero en lugar de </text:span><text:span text:style-name="Source_20_Text"><text:span text:style-name="T3">FLOAT</text:span></text:span><text:span text:style-name="T3"> para evitar errores de redondeo en Java).</text:span></text:p>
        </text:list-item>
      </text:list>
      <text:p text:style-name="Horizontal_20_Line"/>
      <text:h text:style-name="P16" text:outline-level="3">¿Cómo lo organizamos en GitHub?</text:h>
      <text:p text:style-name="P2">Para el módulo de <text:span text:style-name="T1">Entornos de Desarrollo</text:span>, tu carpeta de SQL debería ser así:</text:p>
      <text:p text:style-name="P2">Plaintext</text:p>
      <text:p text:style-name="P10"><text:span text:style-name="Source_20_Text"><text:span text:style-name="T3">/sql/</text:span></text:span></text:p>
      <text:p text:style-name="P11"><text:span text:style-name="Source_20_Text"><text:s text:c="2"/>├── </text:span><text:span text:style-name="Source_20_Text"><text:span text:style-name="T3">01_creacion_tablas.sql</text:span></text:span></text:p>
      <text:p text:style-name="P11"><text:span text:style-name="Source_20_Text"><text:s text:c="2"/>├── </text:span><text:span text:style-name="Source_20_Text"><text:span text:style-name="T3">02_insercion_datos.sql</text:span></text:span></text:p>
      <text:p text:style-name="P11"><text:span text:style-name="Source_20_Text"><text:s text:c="2"/>├── </text:span><text:span text:style-name="Source_20_Text"><text:span text:style-name="T3">03_consultas_utiles.sql</text:span></text:span></text:p>
      <text:p text:style-name="P11"><text:span text:style-name="Source_20_Text"><text:s text:c="2"/>└── </text:span><text:span text:style-name="Source_20_Text"><text:span text:style-name="T3">diagrama_ER.pdf</text:span></text:span></text:p>
      <text:h text:style-name="P16" text:outline-level="3">¿Qué necesitamos para empezar?</text:h>
      <text:p text:style-name="P2">Para poder diseñarte el <text:span text:style-name="T1">Diagrama E/R</text:span> y el <text:span text:style-name="T1">Modelo Relacional</text:span> ahora mismo:</text:p>
      <text:list text:style-name="L6">
        <text:list-item>
          <text:p text:style-name="P17"><text:span text:style-name="T1">¿Cuál es la temática de tu proyecto?</text:span> (Ejemplo: Gestión de un gimnasio, una tienda de videojuegos, una protectora de animales...).</text:p>
        </text:list-item>
        <text:list-item>
          <text:p text:style-name="P17"><text:span text:style-name="T1">¿Qué tres cosas principales quieres que haga el usuario?</text:span> (Ej: Registrarse, comprar un producto y ver su historial)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7:10:12.203756500</meta:creation-date>
    <dc:date>2026-03-19T17:19:16.302081900</dc:date>
    <meta:editing-duration>PT9M4S</meta:editing-duration>
    <meta:editing-cycles>1</meta:editing-cycles>
    <meta:document-statistic meta:table-count="0" meta:image-count="0" meta:object-count="0" meta:page-count="5" meta:paragraph-count="134" meta:word-count="923" meta:character-count="5613" meta:non-whitespace-character-count="4794"/>
    <meta:generator>LibreOffice/25.8.4.2$Windows_X86_64 LibreOffice_project/290daaa01b999472f0c7a3890eb6a550fd74c6df</meta:generator>
  </office:meta>
</office:document-meta>
</file>