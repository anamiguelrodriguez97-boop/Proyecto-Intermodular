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se te pide en este módulo dentro del Proyecto Intermodular?</text:p>
      <text:p text:style-name="Standard">En el módulo de Programación vas a construir el corazón de tu proyecto: la</text:p>
      <text:p text:style-name="Standard">aplicación funcional.</text:p>
      <text:p text:style-name="Standard">Aquí no se evalúan ideas ni bocetos, sino código que funcione. Tu aplicación debe</text:p>
      <text:p text:style-name="Standard">ser capaz de realizar acciones reales relacionadas con el problema que hayas</text:p>
      <text:p text:style-name="Standard">planteado.</text:p>
      <text:p text:style-name="Standard">Además, este módulo está directamente conectado con Bases de Datos, ya que tu</text:p>
      <text:p text:style-name="Standard">aplicación deberá comunicarse con la base de datos mediante JDBC.</text:p>
      <text:p text:style-name="Standard"/>
      <text:p text:style-name="Standard">¿Qué debe incluir tu aplicación?</text:p>
      <text:p text:style-name="Standard">1. Uso correcto de fundamentos de programación</text:p>
      <text:p text:style-name="Standard">Tu código debe demostrar que dominas los contenidos de 1o, como por ejemplo:</text:p>
      <text:p text:style-name="Standard">● Variables y tipos de datos</text:p>
      <text:p text:style-name="Standard"/>
      <text:p text:style-name="Standard">● Condicionales</text:p>
      <text:p text:style-name="Standard"/>
      <text:p text:style-name="Standard">● Bucles</text:p>
      <text:p text:style-name="Standard"/>
      <text:p text:style-name="Standard">● Métodos / funciones</text:p>
      <text:p text:style-name="Standard"/>
      <text:p text:style-name="Standard">● Clases y objetos</text:p>
      <text:p text:style-name="Standard"/>
      <text:p text:style-name="Standard">● Estructuras de datos básicas</text:p>
      <text:p text:style-name="Standard"/>
      <text:p text:style-name="Standard">● Manejo de errores</text:p>
      <text:p text:style-name="Standard"/>
      <text:p text:style-name="Standard">● Modularización del código</text:p>
      <text:p text:style-name="Standard"/>
      <text:p text:style-name="Standard">● Buenas prácticas de programación</text:p>
      <text:p text:style-name="Standard"/>
      <text:p text:style-name="Standard">No se busca un proyecto enorme, sino uno bien hecho, coherente y limpio.</text:p>
      <text:p text:style-name="Standard"/>
      <text:p text:style-name="Standard">2. Funcionalidad real</text:p>
      <text:p text:style-name="Standard">Tu aplicación debe hacer cosas reales, por ejemplo:</text:p>
      <text:p text:style-name="Standard">● Añadir datos</text:p>
      <text:p text:style-name="Standard"/>
      <text:p text:style-name="Standard">● Modificar datos</text:p>
      <text:p text:style-name="Standard"/>
      <text:p text:style-name="Standard">● Eliminar datos</text:p>
      <text:p text:style-name="Standard"/>
      <text:p text:style-name="Standard">● Consultar datos</text:p>
      <text:p text:style-name="Standard"/>
      <text:p text:style-name="Standard">● Buscar información</text:p>
      <text:p text:style-name="Standard"/>
      <text:p text:style-name="Standard">● Mostrar listados</text:p>
      <text:p text:style-name="Standard"/>
      <text:p text:style-name="Standard">● Filtrar resultados</text:p>
      <text:p text:style-name="Standard"/>
      <text:p text:style-name="Standard">Todo esto debe tener sentido con el objetivo de tu proyecto.</text:p>
      <text:p text:style-name="Standard"/>
      <text:p text:style-name="Standard">3. Conexión con Base de Datos mediante JDBC (obligatorio)</text:p>
      <text:p text:style-name="Standard">Este punto es clave.</text:p>
      <text:p text:style-name="Standard"><text:soft-page-break/>Tu aplicación debe:</text:p>
      <text:p text:style-name="Standard">● Conectarse a la base de datos mediante JDBC</text:p>
      <text:p text:style-name="Standard">● Realizar operaciones reales (CRUD)</text:p>
      <text:p text:style-name="Standard">● Lanzar consultas</text:p>
      <text:p text:style-name="Standard">● Recoger resultados</text:p>
      <text:p text:style-name="Standard">● Mostrar información</text:p>
      <text:p text:style-name="Standard">No vale simular datos en memoria: aquí se evalúa que tu programa use de verdad</text:p>
      <text:p text:style-name="Standard">la base de datos que has diseñado en el módulo de BBDD.</text:p>
      <text:p text:style-name="Standard"/>
      <text:p text:style-name="Standard">4. Interfaz básica (según nivel)</text:p>
      <text:p text:style-name="Standard">No se exige una interfaz profesional, pero sí algo usable:</text:p>
      <text:p text:style-name="Standard">● Menú por consola</text:p>
      <text:p text:style-name="Standard"/>
      <text:p text:style-name="Standard">● Interfaz sencilla</text:p>
      <text:p text:style-name="Standard"/>
      <text:p text:style-name="Standard">● Ventanas básicas</text:p>
      <text:p text:style-name="Standard"/>
      <text:p text:style-name="Standard">● O sistema de navegación simple</text:p>
      <text:p text:style-name="Standard"/>
      <text:p text:style-name="Standard">Lo importante es que el usuario pueda interactuar con la aplicación.</text:p>
      <text:p text:style-name="Standard"/>
      <text:p text:style-name="Standard">5. Coherencia con el proyecto global</text:p>
      <text:p text:style-name="Standard">Tu aplicación debe estar alineada con:</text:p>
      <text:p text:style-name="Standard">● El modelo de datos</text:p>
      <text:p text:style-name="Standard"/>
      <text:p text:style-name="Standard">● El XML</text:p>
      <text:p text:style-name="Standard"/>
      <text:p text:style-name="Standard">● La temática</text:p>
      <text:p text:style-name="Standard"/>
      <text:p text:style-name="Standard">● El objetivo del proyecto</text:p>
      <text:p text:style-name="Standard"/>
      <text:p text:style-name="Standard">No se valora código sin relación con el resto.</text:p>
      <text:p text:style-name="Standard">Entregables</text:p>
      <text:p text:style-name="Standard">En GitHub deberás incluir:</text:p>
      <text:p text:style-name="Standard">● Código fuente completo</text:p>
      <text:p text:style-name="Standard"/>
      <text:p text:style-name="Standard">● Conexión JDBC configurada</text:p>
      <text:p text:style-name="Standard"/>
      <text:p text:style-name="Standard">● Clases organizadas</text:p>
      <text:p text:style-name="Standard"/>
      <text:p text:style-name="Standard">● README con:</text:p>
      <text:p text:style-name="Standard"/>
      <text:p text:style-name="Standard">○ Qué hace la aplicación</text:p>
      <text:p text:style-name="Standard"/>
      <text:p text:style-name="Standard">○ Cómo se ejecuta</text:p>
      <text:p text:style-name="Standard"/>
      <text:p text:style-name="Standard">○ Qué funcionalidades tiene</text:p>
      <text:p text:style-name="Standard"/>
      <text:p text:style-name="Standard">○ Qué parte usa la base de datos</text:p>
      <text:p text:style-name="Standard"/>
      <text:p text:style-name="Standard">Rúbrica – Programación (0485)</text:p>
      <text:p text:style-name="Standard"/>
      <text:p text:style-name="Standard"><text:soft-page-break/>Criterio Descripción Punto</text:p>
      <text:p text:style-name="Standard">s</text:p>
      <text:p text:style-name="Standard"/>
      <text:p text:style-name="Standard">Uso de fundamentos de</text:p>
      <text:p text:style-name="Standard">programación</text:p>
      <text:p text:style-name="Standard"/>
      <text:p text:style-name="Standard">Variables, estructuras, clases,</text:p>
      <text:p text:style-name="Standard">modularización, limpieza</text:p>
      <text:p text:style-name="Standard"/>
      <text:p text:style-name="Standard">2</text:p>
      <text:p text:style-name="Standard"/>
      <text:p text:style-name="Standard">Funcionalidad real La aplicación hace cosas útiles y</text:p>
      <text:p text:style-name="Standard"/>
      <text:p text:style-name="Standard">coherentes</text:p>
      <text:p text:style-name="Standard"/>
      <text:p text:style-name="Standard">2</text:p>
      <text:p text:style-name="Standard"/>
      <text:p text:style-name="Standard">Conexión JDBC Conexión correcta con la BBDD 2</text:p>
      <text:p text:style-name="Standard"/>
      <text:p text:style-name="Standard">Operaciones CRUD Insertar, consultar, modificar, borrar datos 2</text:p>
      <text:p text:style-name="Standard"/>
      <text:p text:style-name="Standard">Gestión de errores Manejo básico de errores y excepciones 0,5</text:p>
      <text:p text:style-name="Standard">Organización del código Carpetas, clases, nombres, estructura 0,5</text:p>
      <text:p text:style-name="Standard">Integración con el proyecto Coherencia con BBDD y objetivo 0,5</text:p>
      <text:p text:style-name="Standard"/>
      <text:p text:style-name="Standard">Documentación README claro, instrucciones y</text:p>
      <text:p text:style-name="Standard"/>
      <text:p text:style-name="Standard">explicación</text:p>
      <text:p text:style-name="Standard"/>
      <text:p text:style-name="Standard">0,5</text:p>
      <text:p text:style-name="Standard"/>
      <text:p text:style-name="Standard">Total 10</text:p>
      <text:p text:style-name="Standard"/>
      <text:p text:style-name="Standard"/>
      <text:h text:style-name="Heading_20_2" text:outline-level="2">1. Arquitectura del Código (Modularización)</text:h>
      <text:p text:style-name="Text_20_body">Para cumplir con los puntos de "Organización" y "Fundamentos", te recomiendo el patrón <text:span text:style-name="T1">DAO (Data Access Object)</text:span>. Es el estándar para proyectos con JDBC:</text:p>
      <text:list text:style-name="L1">
        <text:list-item>
          <text:p text:style-name="P1"><text:span text:style-name="T1">Modelo (Entities):</text:span> Clases Java que representan tus tablas (ej: <text:span text:style-name="Source_20_Text">Producto.java</text:span>, <text:span text:style-name="Source_20_Text">Usuario.java</text:span>).</text:p>
        </text:list-item>
        <text:list-item>
          <text:p text:style-name="P1"><text:span text:style-name="T1">DAO (Capa de Datos):</text:span> Clases que contienen los métodos SQL (<text:span text:style-name="Source_20_Text">insertar()</text:span>, <text:span text:style-name="Source_20_Text">listar()</text:span>, <text:span text:style-name="Source_20_Text">eliminar()</text:span>).</text:p>
        </text:list-item>
        <text:list-item>
          <text:p text:style-name="P1"><text:span text:style-name="T1">Controller/Service:</text:span> La lógica de negocio.</text:p>
        </text:list-item>
        <text:list-item>
          <text:p text:style-name="P1"><text:span text:style-name="T1">Vista:</text:span> Tu menú por consola o ventanas (Swing/JavaFX).</text:p>
        </text:list-item>
      </text:list>
      <text:p text:style-name="Horizontal_20_Line"/>
      <text:h text:style-name="Heading_20_2" text:outline-level="2"><text:soft-page-break/>2. Conexión JDBC: El corazón (2 puntos)</text:h>
      <text:p text:style-name="Text_20_body">No repitas el código de conexión en cada clase. Crea una clase <text:span text:style-name="Source_20_Text"><text:span text:style-name="T1">ConexionBD.java</text:span></text:span> única (Singleton o estática) que gestione el <text:span text:style-name="Source_20_Text">DriverManager</text:span>.</text:p>
      <text:p text:style-name="Quotations"><text:span text:style-name="T1">Tip de seguridad:</text:span> Usa archivos de configuración (como un <text:span text:style-name="Source_20_Text">.properties</text:span> o el XML de Lenguajes de Marcas) para leer el usuario y la contraseña de la base de datos. ¡No los escribas directamente en el código!</text:p>
      <text:p text:style-name="Horizontal_20_Line"/>
      <text:h text:style-name="Heading_20_2" text:outline-level="2">3. Operaciones CRUD (2 puntos)</text:h>
      <text:p text:style-name="Text_20_body">Tu aplicación debe permitir al usuario completar el ciclo de vida de los datos. Por ejemplo, si es una tienda:</text:p>
      <text:list text:style-name="L2">
        <text:list-item>
          <text:p text:style-name="P2"><text:span text:style-name="T1">Create:</text:span> Registrar un nuevo producto.</text:p>
        </text:list-item>
        <text:list-item>
          <text:p text:style-name="P2"><text:span text:style-name="T1">Read:</text:span> Listar el inventario o buscar un producto por ID.</text:p>
        </text:list-item>
        <text:list-item>
          <text:p text:style-name="P2"><text:span text:style-name="T1">Update:</text:span> Cambiar el precio o el stock de un artículo.</text:p>
        </text:list-item>
        <text:list-item>
          <text:p text:style-name="P2"><text:span text:style-name="T1">Delete:</text:span> Dar de baja un producto descatalogado.</text:p>
        </text:list-item>
      </text:list>
      <text:p text:style-name="Horizontal_20_Line"/>
      <text:h text:style-name="Heading_20_2" text:outline-level="2">4. Gestión de Errores (Excepciones)</text:h>
      <text:p text:style-name="Text_20_body">Java es muy estricto con SQL. Para esos <text:span text:style-name="T1">0,5 puntos de gestión de errores</text:span>, asegúrate de:</text:p>
      <text:list text:style-name="L3">
        <text:list-item>
          <text:p text:style-name="P3">Usar bloques <text:span text:style-name="Source_20_Text">try-catch</text:span> para capturar <text:span text:style-name="Source_20_Text">SQLException</text:span>.</text:p>
        </text:list-item>
        <text:list-item>
          <text:p text:style-name="P3">Cerrar siempre los recursos (<text:span text:style-name="Source_20_Text">Connection</text:span>, <text:span text:style-name="Source_20_Text">PreparedStatement</text:span>, <text:span text:style-name="Source_20_Text">ResultSet</text:span>) en un bloque <text:span text:style-name="Source_20_Text">finally</text:span> o usar <text:span text:style-name="T1">try-with-resources</text:span>.</text:p>
        </text:list-item>
        <text:list-item>
          <text:p text:style-name="P3">Informar al usuario de forma amigable (ej: "Error: No se pudo conectar a la base de datos" en lugar de un volcado de pila rojo).</text:p>
        </text:list-item>
      </text:list>
      <text:p text:style-name="Horizontal_20_Line"/>
      <text:h text:style-name="Heading_20_2" text:outline-level="2">5. Ejemplo de Código Profesional (PreparedStatement)</text:h>
      <text:p text:style-name="Text_20_body">Para que el profesor vea que sabes programar bien, <text:span text:style-name="T1">nunca</text:span> concatenes Strings en las consultas SQL (evita el SQL Injection). Usa siempre <text:span text:style-name="Source_20_Text">PreparedStatement</text:span>:</text:p>
      <text:p text:style-name="P4">Java</text:p>
      <text:p text:style-name="Preformatted_20_Text"><text:span text:style-name="Source_20_Text">// Ejemplo de inserción profesional</text:span></text:p>
      <text:p text:style-name="Preformatted_20_Text"><text:span text:style-name="Source_20_Text">public void insertarProducto(Producto p) {</text:span></text:p>
      <text:p text:style-name="Preformatted_20_Text"><text:span text:style-name="Source_20_Text"><text:s text:c="4"/>String sql = "INSERT INTO productos (nombre, precio, stock) VALUES (?, ?, ?)";</text:span></text:p>
      <text:p text:style-name="Preformatted_20_Text"><text:span text:style-name="Source_20_Text"><text:s text:c="4"/></text:span></text:p>
      <text:p text:style-name="Preformatted_20_Text"><text:span text:style-name="Source_20_Text"><text:s text:c="4"/>try (Connection conn = ConexionBD.getConexion();</text:span></text:p>
      <text:p text:style-name="Preformatted_20_Text"><text:span text:style-name="Source_20_Text"><text:s text:c="9"/>PreparedStatement pstmt = conn.prepareStatement(sql)) {</text:span></text:p>
      <text:p text:style-name="Preformatted_20_Text"><text:span text:style-name="Source_20_Text"><text:s text:c="8"/></text:span></text:p>
      <text:p text:style-name="Preformatted_20_Text"><text:span text:style-name="Source_20_Text"><text:s text:c="8"/>pstmt.setString(1, p.getNombre());</text:span></text:p>
      <text:p text:style-name="Preformatted_20_Text"><text:soft-page-break/><text:span text:style-name="Source_20_Text"><text:s text:c="8"/>pstmt.setDouble(2, p.getPrecio());</text:span></text:p>
      <text:p text:style-name="Preformatted_20_Text"><text:span text:style-name="Source_20_Text"><text:s text:c="8"/>pstmt.setInt(3, p.getStock()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pstmt.executeUpdate();</text:span></text:p>
      <text:p text:style-name="Preformatted_20_Text"><text:span text:style-name="Source_20_Text"><text:s text:c="8"/>System.out.println("✅ Producto guardado con éxito.");</text:span></text:p>
      <text:p text:style-name="Preformatted_20_Text"><text:span text:style-name="Source_20_Text"><text:s text:c="8"/></text:span></text:p>
      <text:p text:style-name="Preformatted_20_Text"><text:span text:style-name="Source_20_Text"><text:s text:c="4"/>} catch (SQLException e) {</text:span></text:p>
      <text:p text:style-name="Preformatted_20_Text"><text:span text:style-name="Source_20_Text"><text:s text:c="8"/>System.err.println("❌ Error al insertar: " + e.getMessage());</text:span></text:p>
      <text:p text:style-name="Preformatted_20_Text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2" text:outline-level="2">Estrategia para tu Repositorio (ED + PROG)</text:h>
      <text:p text:style-name="Text_20_body">En tu carpeta <text:span text:style-name="Source_20_Text">/src</text:span>, organiza los paquetes así:</text:p>
      <text:list text:style-name="L4">
        <text:list-item>
          <text:p text:style-name="P6"><text:span text:style-name="Source_20_Text">com.proyecto.model</text:span></text:p>
        </text:list-item>
        <text:list-item>
          <text:p text:style-name="P6"><text:span text:style-name="Source_20_Text">com.proyecto.dao</text:span></text:p>
        </text:list-item>
        <text:list-item>
          <text:p text:style-name="P6"><text:span text:style-name="Source_20_Text">com.proyecto.view</text:span></text:p>
        </text:list-item>
        <text:list-item>
          <text:p text:style-name="P6"><text:span text:style-name="Source_20_Text">com.proyecto.main</text:span></text:p>
        </text:list-item>
      </text:list>
      <text:p text:style-name="Horizontal_20_Line"/>
      <text:h text:style-name="Heading_20_3" text:outline-level="3">¿Cómo empezamos a programar tu app?</text:h>
      <text:p text:style-name="Text_20_body">Ya tenemos todas las piezas del puzzle (Sistemas, Marcas, BBDD, Entornos y Programación). Para ayudarte con el código base:</text:p>
      <text:list text:style-name="L5">
        <text:list-item>
          <text:p text:style-name="P7"><text:span text:style-name="T1">¿Qué interfaz prefieres?</text:span> ¿Un menú de consola (más rápido de hacer) o una interfaz gráfica con ventanas (Swing/JavaFX)?</text:p>
        </text:list-item>
        <text:list-item>
          <text:p text:style-name="P7"><text:span text:style-name="T1">¿Cuál es la función principal de tu app?</text:span> (Ej: "Vender libros", "Gestionar citas", "Controlar stock de almacén").</text:p>
        </text:list-item>
      </text:list>
      <text:p text:style-name="P8">Dime la temática y te paso el esquema de clases Java y la clase de Conexión JDBC para que empieces hoy mism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7:16:56.994317700</meta:creation-date>
    <dc:date>2026-03-19T17:19:19.983166600</dc:date>
    <meta:editing-duration>PT2M23S</meta:editing-duration>
    <meta:editing-cycles>1</meta:editing-cycles>
    <meta:document-statistic meta:table-count="0" meta:image-count="0" meta:object-count="0" meta:page-count="5" meta:paragraph-count="137" meta:word-count="920" meta:character-count="5842" meta:non-whitespace-character-count="4970"/>
    <meta:generator>LibreOffice/25.8.4.2$Windows_X86_64 LibreOffice_project/290daaa01b999472f0c7a3890eb6a550fd74c6df</meta:generator>
  </office:meta>
</office:document-meta>
</file>