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ntregables</text:p>
      <text:p text:style-name="Standard">Para este módulo tendrás que entregar:</text:p>
      <text:p text:style-name="Standard">● Diagrama E/R (PDF o imagen).</text:p>
      <text:p text:style-name="Standard"/>
      <text:p text:style-name="Standard">● Modelo relacional.</text:p>
      <text:p text:style-name="Standard"/>
      <text:p text:style-name="Standard">● Script SQL de creación de tablas.</text:p>
      <text:p text:style-name="Standard"/>
      <text:p text:style-name="Standard">● Script SQL de inserción de datos.</text:p>
      <text:p text:style-name="Standard"/>
      <text:p text:style-name="Standard">● Script con consultas.</text:p>
      <text:p text:style-name="Standard"/>
      <text:p text:style-name="Standard">● Repositorio en GitHub con todo organizado.</text:p>
      <text:p text:style-name="Standard"/>
      <text:p text:style-name="Standard">● README explicando tu diseño.</text:p>
      <text:p text:style-name="Standard"/>
      <text:p text:style-name="Standard">Entregables</text:p>
      <text:p text:style-name="Standard">Para este módulo tendrás que entregar:</text:p>
      <text:p text:style-name="Standard">● Link al repositorio GitHub (público o privado según se indique)</text:p>
      <text:p text:style-name="Standard"/>
      <text:p text:style-name="Standard">● Repositorio estructurado</text:p>
      <text:p text:style-name="Standard"/>
      <text:p text:style-name="Standard">● Historial de commits coherente</text:p>
      <text:p text:style-name="Standard"/>
      <text:p text:style-name="Standard">● README completo y profesional</text:p>
      <text:p text:style-name="Standard"/>
      <text:p text:style-name="Standard">Entregables</text:p>
      <text:p text:style-name="Standard">Para este módulo tendrás que entregar:</text:p>
      <text:p text:style-name="Standard">● Link al repositorio GitHub (público o privado según se indique)</text:p>
      <text:p text:style-name="Standard"/>
      <text:p text:style-name="Standard">● Repositorio estructurado</text:p>
      <text:p text:style-name="Standard"/>
      <text:p text:style-name="Standard">● Historial de commits coherente</text:p>
      <text:p text:style-name="Standard"/>
      <text:p text:style-name="Standard">● README completo y profesional</text:p>
      <text:p text:style-name="Standard"/>
      <text:p text:style-name="Standard">Entregables</text:p>
      <text:p text:style-name="Standard">En GitHub deberás incluir:</text:p>
      <text:p text:style-name="Standard">● Código fuente completo</text:p>
      <text:p text:style-name="Standard"/>
      <text:p text:style-name="Standard">● Conexión JDBC configurada</text:p>
      <text:p text:style-name="Standard"/>
      <text:p text:style-name="Standard">● Clases organizadas</text:p>
      <text:p text:style-name="Standard"/>
      <text:p text:style-name="Standard">● README con:</text:p>
      <text:p text:style-name="Standard"/>
      <text:p text:style-name="Standard">○ Qué hace la aplicación</text:p>
      <text:p text:style-name="Standard"/>
      <text:p text:style-name="Standard">○ Cómo se ejecuta</text:p>
      <text:p text:style-name="Standard"/>
      <text:p text:style-name="Standard">○ Qué funcionalidades tiene</text:p>
      <text:p text:style-name="Standard"/>
      <text:p text:style-name="Standard"><text:soft-page-break/>○ Qué parte usa la base de datos</text:p>
      <text:p text:style-name="Standard"/>
      <text:p text:style-name="Standard">Entregables</text:p>
      <text:p text:style-name="Standard">En GitHub:</text:p>
      <text:p text:style-name="Standard">● Código completo con estructura clara</text:p>
      <text:p text:style-name="Standard"/>
      <text:p text:style-name="Standard">● README (puede ser el mismo del proyecto) incluyendo:</text:p>
      <text:p text:style-name="Standard"/>
      <text:p text:style-name="Standard">○ Explicación de la arquitectura del proyecto (breve)</text:p>
      <text:p text:style-name="Standard"/>
      <text:p text:style-name="Standard">○ Diagrama simple de clases (opcional pero valorado)</text:p>
      <text:p text:style-name="Standard"/>
      <text:p text:style-name="Standard">○ Qué parte corresponde al MPO (qué mejora has hecho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10:53:20.736204100</meta:creation-date>
    <dc:date>2026-05-02T11:38:08.991125600</dc:date>
    <meta:editing-duration>P1DT34M29S</meta:editing-duration>
    <meta:editing-cycles>1</meta:editing-cycles>
    <meta:document-statistic meta:table-count="0" meta:image-count="0" meta:object-count="0" meta:page-count="2" meta:paragraph-count="38" meta:word-count="192" meta:character-count="1164" meta:non-whitespace-character-count="1010"/>
    <meta:generator>LibreOffice/25.8.5.2$Windows_X86_64 LibreOffice_project/9c8b85f387cc00a89945a79c9e6239f32e450ac2</meta:generator>
  </office:meta>
</office:document-meta>
</file>