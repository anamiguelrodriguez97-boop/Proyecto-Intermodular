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style:contextual-spacing="false" fo:line-height="175%" fo:text-indent="0cm" style:auto-text-indent="false"/>
      <style:text-properties style:font-name="Google Sans Flex" fo:font-size="12pt" fo:letter-spacing="normal" fo:font-weight="normal"/>
    </style:style>
    <style:style style:name="P2" style:family="paragraph" style:parent-style-name="Text_20_body">
      <style:paragraph-properties fo:margin-left="0cm" fo:margin-right="0cm" fo:margin-top="0cm" fo:margin-bottom="0.423cm" style:contextual-spacing="false" fo:line-height="175%" fo:text-indent="0cm" style:auto-text-indent="false"/>
      <style:text-properties style:font-name="Google Sans Flex" fo:font-size="12pt" fo:letter-spacing="normal" fo:font-weight="normal" loext:padding="0cm" loext:border="none"/>
    </style:style>
    <style:style style:name="P3" style:family="paragraph" style:parent-style-name="Horizontal_20_Line">
      <style:paragraph-properties fo:line-height="175%"/>
    </style:style>
    <style:style style:name="P4" style:family="paragraph" style:parent-style-name="Heading_20_2">
      <style:paragraph-properties fo:margin-left="0cm" fo:margin-right="0cm" fo:margin-top="0.741cm" fo:margin-bottom="0.212cm" style:contextual-spacing="false" style:line-height-at-least="0.741cm" fo:text-indent="0cm" style:auto-text-indent="false"/>
      <style:text-properties style:font-name="Google Sans Flex" fo:font-size="15pt" fo:letter-spacing="normal" fo:font-weight="bold" loext:padding="0cm" loext:border="none"/>
    </style:style>
    <style:style style:name="P5" style:family="paragraph" style:parent-style-name="Text_20_body">
      <style:paragraph-properties fo:margin-left="0cm" fo:margin-right="0cm" fo:margin-top="0cm" fo:margin-bottom="0.212cm" style:contextual-spacing="false" fo:line-height="175%" fo:text-indent="0cm" style:auto-text-indent="false"/>
      <style:text-properties style:font-name="Google Sans Flex" fo:font-size="12pt" fo:letter-spacing="normal" fo:font-weight="normal" loext:padding="0cm" loext:border="none"/>
    </style:style>
    <style:style style:name="P6" style:family="paragraph" style:parent-style-name="Text_20_body" style:list-style-name="L1">
      <style:paragraph-properties fo:margin-left="0cm" fo:margin-right="0cm" fo:margin-top="0.212cm" fo:margin-bottom="0.212cm" style:contextual-spacing="false" fo:line-height="175%" fo:text-indent="0cm" style:auto-text-indent="false" fo:padding="0cm" fo:border="none"/>
      <style:text-properties style:font-name="Google Sans Flex" fo:font-size="12pt" fo:letter-spacing="normal" fo:font-weight="normal" loext:padding="0cm" loext:border="none"/>
    </style:style>
    <style:style style:name="P7" style:family="paragraph" style:parent-style-name="Text_20_body" style:list-style-name="L2">
      <style:paragraph-properties fo:margin-left="0cm" fo:margin-right="0cm" fo:margin-top="0.212cm" fo:margin-bottom="0.212cm" style:contextual-spacing="false" fo:line-height="175%" fo:text-indent="0cm" style:auto-text-indent="false" fo:padding="0cm" fo:border="none"/>
      <style:text-properties style:font-name="Google Sans Flex" fo:font-size="12pt" fo:letter-spacing="normal" fo:font-weight="normal" loext:padding="0cm" loext:border="none"/>
    </style:style>
    <style:style style:name="P8" style:family="paragraph" style:parent-style-name="Quotations">
      <style:paragraph-properties fo:margin-left="0cm" fo:margin-right="0cm" fo:margin-top="0cm" fo:margin-bottom="0.212cm" style:contextual-spacing="false" fo:line-height="175%" fo:text-indent="0cm" style:auto-text-indent="false"/>
      <style:text-properties style:font-name="Google Sans Flex" fo:font-size="12pt" fo:letter-spacing="normal" fo:font-weight="normal" loext:padding="0cm" loext:border="none"/>
    </style:style>
    <style:style style:name="P9" style:family="paragraph" style:parent-style-name="Quotations" style:list-style-name="L3">
      <style:paragraph-properties fo:margin-left="0cm" fo:margin-right="0cm" fo:margin-top="0.212cm" fo:margin-bottom="0.212cm" style:contextual-spacing="false" fo:line-height="175%" fo:text-indent="0cm" style:auto-text-indent="false" fo:padding="0cm" fo:border="none"/>
      <style:text-properties style:font-name="Google Sans Flex" fo:font-size="12pt" fo:letter-spacing="normal" fo:font-weight="normal" loext:padding="0cm" loext:border="none"/>
    </style:style>
    <style:style style:name="P10" style:family="paragraph" style:parent-style-name="Text_20_body" style:list-style-name="L4">
      <style:paragraph-properties fo:margin-left="0cm" fo:margin-right="0cm" fo:margin-top="0.212cm" fo:margin-bottom="0.212cm" style:contextual-spacing="false" style:line-height-at-least="0.529cm" fo:text-indent="0cm" style:auto-text-indent="false" fo:padding="0cm" fo:border="none"/>
    </style:style>
    <style:style style:name="P11" style:family="paragraph" style:parent-style-name="Text_20_body" style:list-style-name="L4">
      <style:paragraph-properties fo:margin-left="0cm" fo:margin-right="0cm" fo:margin-top="0.212cm" fo:margin-bottom="0.212cm" style:contextual-spacing="false" fo:line-height="175%" fo:text-indent="0cm" style:auto-text-indent="false" fo:padding="0cm" fo:border="none"/>
      <style:text-properties style:font-name="Google Sans Flex" fo:font-size="12pt" fo:letter-spacing="normal" fo:font-weight="normal" loext:padding="0cm" loext:border="none"/>
    </style:style>
    <style:style style:name="P12" style:family="paragraph" style:parent-style-name="Text_20_body">
      <style:paragraph-properties fo:margin-left="0cm" fo:margin-right="0cm" fo:margin-top="0cm" fo:margin-bottom="0.212cm" style:contextual-spacing="false" style:line-height-at-least="0.529cm" fo:text-indent="0cm" style:auto-text-indent="false"/>
    </style:style>
    <style:style style:name="P13" style:family="paragraph" style:parent-style-name="Text_20_body" style:list-style-name="L5">
      <style:paragraph-properties fo:margin-left="0cm" fo:margin-right="0cm" fo:margin-top="0.212cm" fo:margin-bottom="0.212cm" style:contextual-spacing="false" style:line-height-at-least="0.529cm" fo:text-indent="0cm" style:auto-text-indent="false" fo:padding="0cm" fo:border="none"/>
    </style:style>
    <style:style style:name="P14" style:family="paragraph" style:parent-style-name="Text_20_body" style:list-style-name="L6">
      <style:paragraph-properties fo:margin-left="0cm" fo:margin-right="0cm" fo:margin-top="0.212cm" fo:margin-bottom="0.212cm" style:contextual-spacing="false" fo:line-height="175%" fo:text-indent="0cm" style:auto-text-indent="false" fo:padding="0cm" fo:border="none"/>
      <style:text-properties style:font-name="Google Sans Flex" fo:font-size="12pt" fo:letter-spacing="normal" fo:font-weight="normal" loext:padding="0cm" loext:border="none"/>
    </style:style>
    <style:style style:name="P15" style:family="paragraph" style:parent-style-name="Text_20_body">
      <style:text-properties loext:padding="0cm" loext:border="none"/>
    </style:style>
    <style:style style:name="P16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e3e3e3" loext:opacity="100%" style:font-name="Times New Roman" fo:letter-spacing="normal" fo:font-style="normal" fo:font-weight="normal"/>
    </style:style>
    <style:style style:name="P17" style:family="paragraph" style:parent-style-name="Text_20_body" style:list-style-name="L7">
      <style:paragraph-properties fo:margin-left="0cm" fo:margin-right="0cm" fo:margin-top="0.212cm" fo:margin-bottom="0.212cm" style:contextual-spacing="false" fo:line-height="175%" fo:text-indent="0cm" style:auto-text-indent="false" fo:padding="0cm" fo:border="none"/>
      <style:text-properties style:font-name="Google Sans Flex" fo:font-size="12pt" fo:letter-spacing="normal" fo:font-weight="normal" loext:padding="0cm" loext:border="none"/>
    </style:style>
    <style:style style:name="P18" style:family="paragraph" style:parent-style-name="Text_20_body" style:list-style-name="L8">
      <style:paragraph-properties fo:margin-left="0cm" fo:margin-right="0cm" fo:margin-top="0.212cm" fo:margin-bottom="0.212cm" style:contextual-spacing="false" fo:line-height="175%" fo:text-indent="0cm" style:auto-text-indent="false" fo:padding="0cm" fo:border="none"/>
      <style:text-properties style:font-name="Google Sans Flex" fo:font-size="12pt" fo:letter-spacing="normal" fo:font-weight="normal" loext:padding="0cm" loext:border="none"/>
    </style:style>
    <style:style style:name="P19" style:family="paragraph" style:parent-style-name="Text_20_body" style:list-style-name="L9">
      <style:paragraph-properties fo:margin-left="0cm" fo:margin-right="0cm" fo:margin-top="0.212cm" fo:margin-bottom="0.212cm" style:contextual-spacing="false" fo:line-height="175%" fo:text-indent="0cm" style:auto-text-indent="false" fo:padding="0cm" fo:border="none"/>
      <style:text-properties style:font-name="Google Sans Flex" fo:font-size="12pt" fo:letter-spacing="normal" fo:font-weight="normal" loext:padding="0cm" loext:border="none"/>
    </style:style>
    <style:style style:name="P20" style:family="paragraph" style:parent-style-name="Text_20_body" style:list-style-name="L9">
      <style:paragraph-properties fo:margin-left="0cm" fo:margin-right="0cm" fo:margin-top="0.212cm" fo:margin-bottom="0.212cm" style:contextual-spacing="false" style:line-height-at-least="0.529cm" fo:text-indent="0cm" style:auto-text-indent="false" fo:padding="0cm" fo:border="none"/>
    </style:style>
    <style:style style:name="P21" style:family="paragraph" style:parent-style-name="Text_20_body" style:list-style-name="L10">
      <style:paragraph-properties fo:margin-left="0cm" fo:margin-right="0cm" fo:margin-top="0.212cm" fo:margin-bottom="0.212cm" style:contextual-spacing="false" style:line-height-at-least="0.529cm" fo:text-indent="0cm" style:auto-text-indent="false" fo:padding="0cm" fo:border="none"/>
    </style:style>
    <style:style style:name="P22" style:family="paragraph" style:parent-style-name="Text_20_body" style:list-style-name="L10">
      <style:paragraph-properties fo:margin-left="0cm" fo:margin-right="0cm" fo:margin-top="0.212cm" fo:margin-bottom="0.212cm" style:contextual-spacing="false" fo:line-height="175%" fo:text-indent="0cm" style:auto-text-indent="false" fo:padding="0cm" fo:border="none"/>
      <style:text-properties style:font-name="Google Sans Flex" fo:font-size="12pt" fo:letter-spacing="normal" fo:font-weight="normal" loext:padding="0cm" loext:border="none"/>
    </style:style>
    <style:style style:name="P23" style:family="paragraph" style:parent-style-name="Text_20_body" style:list-style-name="L11">
      <style:paragraph-properties fo:margin-left="0cm" fo:margin-right="0cm" fo:margin-top="0.212cm" fo:margin-bottom="0.212cm" style:contextual-spacing="false" style:line-height-at-least="0.529cm" fo:text-indent="0cm" style:auto-text-indent="false" fo:padding="0cm" fo:border="none"/>
    </style:style>
    <style:style style:name="P24" style:family="paragraph" style:parent-style-name="Text_20_body" style:list-style-name="L11">
      <style:paragraph-properties fo:margin-left="0cm" fo:margin-right="0cm" fo:margin-top="0.212cm" fo:margin-bottom="0.212cm" style:contextual-spacing="false" fo:line-height="175%" fo:text-indent="0cm" style:auto-text-indent="false" fo:padding="0cm" fo:border="none"/>
      <style:text-properties style:font-name="Google Sans Flex" fo:font-size="12pt" fo:letter-spacing="normal" fo:font-weight="normal" loext:padding="0cm" loext:border="none"/>
    </style:style>
    <style:style style:name="P25" style:family="paragraph" style:parent-style-name="Text_20_body" style:list-style-name="L12">
      <style:paragraph-properties fo:margin-left="0cm" fo:margin-right="0cm" fo:margin-top="0.212cm" fo:margin-bottom="0.212cm" style:contextual-spacing="false" style:line-height-at-least="0.529cm" fo:text-indent="0cm" style:auto-text-indent="false" fo:padding="0cm" fo:border="none"/>
    </style:style>
    <style:style style:name="P26" style:family="paragraph" style:parent-style-name="Text_20_body" style:list-style-name="L13">
      <style:paragraph-properties fo:margin-left="0cm" fo:margin-right="0cm" fo:margin-top="0.212cm" fo:margin-bottom="0.212cm" style:contextual-spacing="false" style:line-height-at-least="0.529cm" fo:text-indent="0cm" style:auto-text-indent="false" fo:padding="0cm" fo:border="none"/>
    </style:style>
    <style:style style:name="P27" style:family="paragraph" style:parent-style-name="Text_20_body" style:list-style-name="L14"/>
    <style:style style:name="P28" style:family="paragraph" style:parent-style-name="Text_20_body" style:list-style-name="L15"/>
    <style:style style:name="P29" style:family="paragraph" style:parent-style-name="Text_20_body" style:list-style-name="L16"/>
    <style:style style:name="P30" style:family="paragraph" style:parent-style-name="Text_20_body" style:list-style-name="L17"/>
    <style:style style:name="P31" style:family="paragraph" style:parent-style-name="Text_20_body" style:list-style-name="L18"/>
    <style:style style:name="P32" style:family="paragraph" style:parent-style-name="Text_20_body" style:list-style-name="L18">
      <style:text-properties fo:font-weight="bold"/>
    </style:style>
    <style:style style:name="P33" style:family="paragraph" style:parent-style-name="Text_20_body" style:list-style-name="L19"/>
    <style:style style:name="T1" style:family="text">
      <style:text-properties fo:font-weight="bold"/>
    </style:style>
    <style:style style:name="T2" style:family="text">
      <style:text-properties style:font-name="Google Sans Flex" fo:font-size="12pt" fo:letter-spacing="normal" fo:font-weight="bold" loext:padding="0cm" loext:border="none"/>
    </style:style>
    <style:style style:name="T3" style:family="text">
      <style:text-properties style:font-name="Google Sans Flex" fo:font-size="12pt" fo:letter-spacing="normal" fo:font-weight="normal" loext:padding="0cm" loext:border="none"/>
    </style:style>
    <style:style style:name="T4" style:family="text">
      <style:text-properties style:font-name="Google Sans Flex" fo:font-size="10.5pt" fo:letter-spacing="normal" fo:font-weight="normal" loext:padding="0cm" loext:border="none"/>
    </style:style>
    <style:style style:name="T5" style:family="text">
      <style:text-properties fo:font-style="itali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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¡Perfecto! Ya tenemos el guion de lo que tu profesor espera. Básicamente, te están pidiendo el <text:span text:style-name="T1">Manual de Operaciones e Infraestructura</text:span> de tu aplicación.</text:p>
      <text:section text:style-name="Sect1" text:name="model-response-message-contentr_47163b99114eaa27">
        <text:p text:style-name="P2">Para que este informe sea de "10", no solo hay que responder las preguntas, sino <text:span text:style-name="T1">justificar técnicamente</text:span> cada decisión. Aquí te ayudo a estructurar el contenido para que solo tengas que adaptarlo a tu software específico:</text:p>
        <text:p text:style-name="P3"/>
        <text:h text:style-name="P4" text:outline-level="2">1. El Tipo de Sistema (Justificación)</text:h>
        <text:p text:style-name="P5">Aquí es donde decides la arquitectura. Mi recomendación para un grado superior es optar por un modelo de <text:span text:style-name="T1">Servidor (o Máquina Virtual)</text:span>, ya que demuestra más conocimientos de redes y sistemas que una simple aplicación de escritorio.</text:p>
        <text:list text:style-name="L1">
          <text:list-item>
            <text:p text:style-name="P6"><text:span text:style-name="T1">Opción A (Recomendada): Máquina Virtual / Contenedor.</text:span> Justificación: Permite el aislamiento de recursos, facilidad de backup y portabilidad (puedes mover el servidor a otro hardware sin reinstalar todo).</text:p>
          </text:list-item>
          <text:list-item>
            <text:p text:style-name="P6"><text:span text:style-name="T1">Opción B: Servidor Local Dedicado.</text:span> Justificación: Si tu app maneja muchos datos o necesita estar disponible 24/7 para varios usuarios.</text:p>
          </text:list-item>
        </text:list>
        <text:p text:style-name="P3"/>
        <text:h text:style-name="P4" text:outline-level="2">2. Requisitos de Hardware</text:h>
        <text:p text:style-name="P5">Debes ser realista. No pidas 32GB de RAM si es un CRUD sencillo.</text:p>
        <text:list text:style-name="L2">
          <text:list-item>
            <text:p text:style-name="P7"><text:span text:style-name="T1">Mínimos:</text:span> Lo justo para que el SO y tu app arranquen (ej. 2GB RAM, 1 CPU Core).</text:p>
          </text:list-item>
          <text:list-item>
            <text:p text:style-name="P7"><text:span text:style-name="T1">Recomendados:</text:span> Lo necesario para que funcione fluido con varios usuarios (ej. 4GB RAM, 2 CPU Cores).</text:p>
          </text:list-item>
        </text:list>
        <text:p text:style-name="P3"/>
        <text:h text:style-name="P4" text:outline-level="2"><text:soft-page-break/>3. Sistema Operativo</text:h>
        <text:p text:style-name="P8"><text:span text:style-name="T1">Tip de experto:</text:span> Si tu aplicación es web o backend, elige <text:span text:style-name="T1">Linux (Ubuntu Server 22.04 LTS o Debian 12)</text:span>. Es el estándar de la industria, es gratuito y consume pocos recursos.</text:p>
        <text:list text:style-name="L3">
          <text:list-item>
            <text:p text:style-name="P9"><text:span text:style-name="T1">Justificación:</text:span> Estabilidad, seguridad nativa por permisos de usuario y gestión eficiente de servicios mediante terminal.</text:p>
          </text:list-item>
        </text:list>
        <text:p text:style-name="P3"/>
        <text:h text:style-name="P4" text:outline-level="2">4. Instalación del Entorno</text:h>
        <text:p text:style-name="P5">Aquí debes crear una "receta". El orden lógico suele ser:</text:p>
        <text:list text:style-name="L4">
          <text:list-item>
            <text:p text:style-name="P10"><text:span text:style-name="T2">Actualización de repositorios:</text:span><text:span text:style-name="T3"> </text:span><text:span text:style-name="Source_20_Text"><text:span text:style-name="T4">sudo apt update &amp;&amp; sudo apt upgrade</text:span></text:span><text:span text:style-name="T3">.</text:span></text:p>
          </text:list-item>
          <text:list-item>
            <text:p text:style-name="P11"><text:span text:style-name="T1">Instalación de dependencias de lenguaje:</text:span> (Node.js, Python, Java JRE/JDK).</text:p>
          </text:list-item>
          <text:list-item>
            <text:p text:style-name="P11"><text:span text:style-name="T1">Instalación del motor de Base de Datos:</text:span> (MySQL, MongoDB, etc.).</text:p>
          </text:list-item>
          <text:list-item>
            <text:p text:style-name="P11"><text:span text:style-name="T1">Configuración del Servidor Web:</text:span> (Nginx o Apache) como proxy inverso.</text:p>
          </text:list-item>
        </text:list>
        <text:p text:style-name="P3"/>
        <text:h text:style-name="P4" text:outline-level="2">5. Usuarios, Permisos y Estructura</text:h>
        <text:p text:style-name="P12"><text:span text:style-name="T3">Este punto es crítico en el módulo de Sistemas. </text:span><text:span text:style-name="T2">Nunca</text:span><text:span text:style-name="T3"> ejecutes tu app como </text:span><text:span text:style-name="Source_20_Text"><text:span text:style-name="T4">root</text:span></text:span><text:span text:style-name="T3">.</text:span></text:p>
        <text:list text:style-name="L5">
          <text:list-item>
            <text:p text:style-name="P13"><text:span text:style-name="T2">Usuarios:</text:span><text:span text:style-name="T3"> Crea un usuario específico para la app (ej. </text:span><text:span text:style-name="Source_20_Text"><text:span text:style-name="T4">user_app</text:span></text:span><text:span text:style-name="T3">).</text:span></text:p>
          </text:list-item>
          <text:list-item>
            <text:p text:style-name="P13"><text:span text:style-name="T2">Permisos:</text:span><text:span text:style-name="T3"> Usa el comando </text:span><text:span text:style-name="Source_20_Text"><text:span text:style-name="T4">chmod</text:span></text:span><text:span text:style-name="T3"> y </text:span><text:span text:style-name="Source_20_Text"><text:span text:style-name="T4">chown</text:span></text:span><text:span text:style-name="T3"> para que solo ese usuario lea el código.</text:span></text:p>
          </text:list-item>
          <text:list-item>
            <text:p text:style-name="P13"><text:span text:style-name="T2">Rutas estándar:</text:span><text:span text:style-name="T3"> * </text:span><text:span text:style-name="Source_20_Text"><text:span text:style-name="T4">/var/www/tu_app</text:span></text:span><text:span text:style-name="T3">: Código fuente.</text:span></text:p>
            <text:list>
              <text:list-item>
                <text:p text:style-name="P13"><text:span text:style-name="Source_20_Text"><text:span text:style-name="T4">/var/log/tu_app</text:span></text:span><text:span text:style-name="T3">: Logs de errores.</text:span></text:p>
              </text:list-item>
              <text:list-item>
                <text:p text:style-name="P13"><text:span text:style-name="Source_20_Text"><text:span text:style-name="T4">/opt/backups</text:span></text:span><text:span text:style-name="T3">: Copias de seguridad.</text:span></text:p>
              </text:list-item>
            </text:list>
          </text:list-item>
        </text:list>
        <text:p text:style-name="P3"/>
        <text:h text:style-name="P4" text:outline-level="2"><text:soft-page-break/>6. Mantenimiento y Protección</text:h>
        <text:list text:style-name="L6">
          <text:list-item>
            <text:p text:style-name="P14"><text:span text:style-name="T1">Mantenimiento:</text:span> Define una tarea programada (<text:span text:style-name="T1">Cron job</text:span>) para limpiar archivos temporales y realizar backups de la base de datos cada 24h.</text:p>
          </text:list-item>
          <text:list-item>
            <text:p text:style-name="P14"><text:span text:style-name="T1">Protección Mínima:</text:span> 1. <text:span text:style-name="T1">Firewall (UFW):</text:span> Cerrar todos los puertos excepto el 80 (HTTP), 443 (HTTPS) y 22 (SSH). 2. <text:span text:style-name="T1">SSH Seguro:</text:span> Deshabilitar el acceso root por SSH. 3. <text:span text:style-name="T1">Fail2Ban:</text:span> Para evitar ataques de fuerza bruta.</text:p>
          </text:list-item>
        </text:list>
      </text:section>
      <text:p text:style-name="P15"><draw:frame draw:style-name="fr1" draw:name="Marco1" text:anchor-type="char" svg:x="0cm" svg:width="0.041cm" draw:z-index="0"><draw:text-box fo:min-height="0.041cm"><text:h text:style-name="P16" text:outline-level="2">Gemini ha dicho</text:h></draw:text-box></draw:frame></text:p>
      <text:p text:style-name="P1">Esta es una guía excelente y muy completa. Al ser para un <text:span text:style-name="T1">Grado Superior de DAM (Desarrollo de Aplicaciones Multiplataforma)</text:span>, el tribunal no solo busca que la aplicación "funcione", sino que el entorno sea <text:span text:style-name="T1">profesional, seguro y escalable</text:span>.</text:p>
      <text:section text:style-name="Sect1" text:name="model-response-message-contentr_b12c68d55a5d3f60">
        <text:p text:style-name="P2">Para ayudarte a aterrizar esto, vamos a simular un caso práctico común (por ejemplo, una <text:span text:style-name="T1">App de Gestión con Backend en Node.js/Python y Base de Datos SQL</text:span>). Aquí tienes cómo deberías completar cada punto para sacar la máxima nota:</text:p>
        <text:p text:style-name="P3"/>
        <text:h text:style-name="P4" text:outline-level="2">1. Tipo de Sistema: El "Dónde"</text:h>
        <text:p text:style-name="P5">No digas solo "en mi portátil". Usa terminología técnica.</text:p>
        <text:list text:style-name="L7">
          <text:list-item>
            <text:p text:style-name="P17"><text:span text:style-name="T1">Propuesta:</text:span> <text:span text:style-name="T1">Máquina Virtual (Ubuntu Server 24.04 LTS)</text:span>.</text:p>
          </text:list-item>
          <text:list-item>
            <text:p text:style-name="P17"><text:span text:style-name="T1">Justificación:</text:span> "Se elige una arquitectura de máquina virtual para aislar las dependencias del proyecto del sistema anfitrión, permitiendo una réplica exacta del entorno de producción y facilitando la creación de snapshots (puntos de restauración) antes de cambios críticos."</text:p>
          </text:list-item>
        </text:list>
        <text:h text:style-name="P4" text:outline-level="2">2. Requisitos de Hardware: La "Potencia"</text:h>
        <text:p text:style-name="P5">Sé específico con las métricas.</text:p>
        <text:list text:style-name="L8">
          <text:list-item>
            <text:p text:style-name="P18"><text:soft-page-break/><text:span text:style-name="T1">CPU:</text:span> Mínimo 1 vCPU (Core), Recomendado 2 vCPUs para manejar peticiones concurrentes y procesos de fondo.</text:p>
          </text:list-item>
          <text:list-item>
            <text:p text:style-name="P18"><text:span text:style-name="T1">RAM:</text:span> Mínimo 2GB (para SO + App), Recomendado 4GB para evitar el uso excesivo de <text:span text:style-name="T5">Swap</text:span>.</text:p>
          </text:list-item>
          <text:list-item>
            <text:p text:style-name="P18"><text:span text:style-name="T1">Almacenamiento:</text:span> 20GB SSD (considerando 5GB para el SO, 2GB para la App y dependencias, y el resto para crecimiento de la BD y logs).</text:p>
          </text:list-item>
        </text:list>
        <text:h text:style-name="P4" text:outline-level="2">3. Sistema Operativo: El "Cerebro"</text:h>
        <text:list text:style-name="L9">
          <text:list-item>
            <text:p text:style-name="P19"><text:span text:style-name="T1">Elección:</text:span> <text:span text:style-name="T1">Linux Ubuntu Server 24.04 LTS</text:span>.</text:p>
          </text:list-item>
          <text:list-item>
            <text:p text:style-name="P20"><text:span text:style-name="T2">Justificación:</text:span><text:span text:style-name="T3"> "Es un sistema de soporte a largo plazo (LTS), lo que garantiza actualizaciones de seguridad durante 5 años. Además, la gestión de servicios mediante </text:span><text:span text:style-name="Source_20_Text"><text:span text:style-name="T4">systemd</text:span></text:span><text:span text:style-name="T3"> y el gestor de paquetes </text:span><text:span text:style-name="Source_20_Text"><text:span text:style-name="T4">apt</text:span></text:span><text:span text:style-name="T3"> simplifica el despliegue del stack tecnológico (Node.js/PostgreSQL)."</text:span></text:p>
          </text:list-item>
        </text:list>
        <text:h text:style-name="P4" text:outline-level="2">4. Instalación del Entorno: El "Manual de Cocina"</text:h>
        <text:p text:style-name="P5">Usa bloques de código para que sea legible.</text:p>
        <text:list text:style-name="L10">
          <text:list-item>
            <text:p text:style-name="P21"><text:span text:style-name="T2">Actualizar sistema:</text:span><text:span text:style-name="T3"> </text:span><text:span text:style-name="Source_20_Text"><text:span text:style-name="T4">sudo apt update &amp;&amp; sudo apt upgrade -y</text:span></text:span></text:p>
          </text:list-item>
          <text:list-item>
            <text:p text:style-name="P21"><text:span text:style-name="T2">Instalar motor:</text:span><text:span text:style-name="T3"> (Ejemplo Node.js) </text:span><text:span text:style-name="Source_20_Text"><text:span text:style-name="T4">curl -fsSL https://deb.nodesource.com/setup_20.x | sudo -E bash - &amp;&amp; sudo apt install -y nodejs</text:span></text:span></text:p>
          </text:list-item>
          <text:list-item>
            <text:p text:style-name="P22"><text:span text:style-name="T1">Configurar BD:</text:span> Instalación de PostgreSQL y creación de tabla/usuario.</text:p>
          </text:list-item>
          <text:list-item>
            <text:p text:style-name="P21"><text:span text:style-name="T2">Variables de entorno:</text:span><text:span text:style-name="T3"> Explicar el uso de un archivo </text:span><text:span text:style-name="Source_20_Text"><text:span text:style-name="T4">.env</text:span></text:span><text:span text:style-name="T3"> para las credenciales de la base de datos (¡nunca hardcodeadas!).</text:span></text:p>
          </text:list-item>
        </text:list>
        <text:h text:style-name="P4" text:outline-level="2">5. Usuarios y Permisos: La "Seguridad"</text:h>
        <text:p text:style-name="P5">Este punto suele flojear en los proyectos de alumnos. Destaca aquí:</text:p>
        <text:list text:style-name="L11">
          <text:list-item>
            <text:p text:style-name="P23"><text:span text:style-name="T2">Usuario de servicio:</text:span><text:span text:style-name="T3"> Crear un usuario sin privilegios llamado </text:span><text:span text:style-name="Source_20_Text"><text:span text:style-name="T4">webapp</text:span></text:span><text:span text:style-name="T3">.</text:span></text:p>
          </text:list-item>
          <text:list-item>
            <text:p text:style-name="P23"><text:span text:style-name="T2">Comando:</text:span><text:span text:style-name="T3"> </text:span><text:span text:style-name="Source_20_Text"><text:span text:style-name="T4">sudo useradd -m -s /bin/bash webapp</text:span></text:span></text:p>
          </text:list-item>
          <text:list-item>
            <text:p text:style-name="P23"><text:span text:style-name="T2">Permisos:</text:span><text:span text:style-name="T3"> El código reside en </text:span><text:span text:style-name="Source_20_Text"><text:span text:style-name="T4">/var/www/proyecto</text:span></text:span><text:span text:style-name="T3"> y pertenece a </text:span><text:span text:style-name="Source_20_Text"><text:span text:style-name="T4">webapp</text:span></text:span><text:span text:style-name="T3">. Los logs en </text:span><text:span text:style-name="Source_20_Text"><text:span text:style-name="T4">/var/log/proyecto</text:span></text:span><text:span text:style-name="T3"> solo son escribibles por este usuario.</text:span></text:p>
          </text:list-item>
          <text:list-item>
            <text:p text:style-name="P24"><text:soft-page-break/><text:span text:style-name="T1">Justificación:</text:span> "Se aplica el <text:span text:style-name="T1">Principio de Menor Privilegio</text:span>: si la aplicación es comprometida, el atacante no tendrá acceso de administrador al resto del sistema."</text:p>
          </text:list-item>
        </text:list>
        <text:h text:style-name="P4" text:outline-level="2">6. Mantenimiento: El "Seguro de Vida"</text:h>
        <text:p text:style-name="P5">Propón una rutina real:</text:p>
        <text:list text:style-name="L12">
          <text:list-item>
            <text:p text:style-name="P25"><text:span text:style-name="T2">Diario:</text:span><text:span text:style-name="T3"> Backup de la base de datos mediante un script de </text:span><text:span text:style-name="Source_20_Text"><text:span text:style-name="T4">pg_dump</text:span></text:span><text:span text:style-name="T3"> ejecutado por un </text:span><text:span text:style-name="T2">Cron Job</text:span><text:span text:style-name="T3"> a las 03:00 AM.</text:span></text:p>
          </text:list-item>
          <text:list-item>
            <text:p text:style-name="P25"><text:span text:style-name="T2">Semanal:</text:span><text:span text:style-name="T3"> Revisión de logs (</text:span><text:span text:style-name="Source_20_Text"><text:span text:style-name="T4">/var/log/syslog</text:span></text:span><text:span text:style-name="T3">) para detectar intentos de intrusión o errores de desbordamiento de memoria.</text:span></text:p>
          </text:list-item>
          <text:list-item>
            <text:p text:style-name="P25"><text:span text:style-name="T2">Mensual:</text:span><text:span text:style-name="T3"> </text:span><text:span text:style-name="Source_20_Text"><text:span text:style-name="T4">sudo apt update</text:span></text:span><text:span text:style-name="T3"> para parches de seguridad del kernel.</text:span></text:p>
          </text:list-item>
        </text:list>
        <text:h text:style-name="P4" text:outline-level="2">7. Evidencias: La "Prueba del Delito"</text:h>
        <text:p text:style-name="P5">En tu Markdown de GitHub, no olvides:</text:p>
        <text:list text:style-name="L13">
          <text:list-item>
            <text:p text:style-name="P26"><text:span text:style-name="T3">Captura de </text:span><text:span text:style-name="Source_20_Text"><text:span text:style-name="T4">systemctl status tu-servicio</text:span></text:span><text:span text:style-name="T3"> (debe salir en verde "active/running").</text:span></text:p>
          </text:list-item>
          <text:list-item>
            <text:p text:style-name="P26"><text:span text:style-name="T3">Captura de </text:span><text:span text:style-name="Source_20_Text"><text:span text:style-name="T4">netstat -tulpn</text:span></text:span><text:span text:style-name="T3"> para mostrar que los puertos (ej. 3000 o 80) están escuchando.</text:span></text:p>
          </text:list-item>
          <text:list-item>
            <text:p text:style-name="P26"><text:span text:style-name="T3">Captura de la terminal haciendo un </text:span><text:span text:style-name="Source_20_Text"><text:span text:style-name="T4">curl localhost:port</text:span></text:span><text:span text:style-name="T3"> recibiendo un JSON de respuesta.</text:span></text:p>
          </text:list-item>
        </text:list>
      </text:section>
      <text:p text:style-name="P15"><draw:frame draw:style-name="fr1" draw:name="Marco2" text:anchor-type="char" svg:x="0cm" svg:width="0.041cm" draw:z-index="1"><draw:text-box fo:min-height="0.041cm"><text:h text:style-name="P16" text:outline-level="2">Gemini ha dicho</text:h></draw:text-box></draw:frame></text:p>
      <text:p text:style-name="Text_20_body">¡Excelente elección! Java es el estándar de la industria para aplicaciones robustas y escalables. En un Grado Superior de DAM, trabajar con Java (probablemente con <text:span text:style-name="T1">Spring Boot</text:span> para el backend o <text:span text:style-name="T1">JavaFX</text:span> para escritorio) te da muchos puntos si demuestras que sabes gestionar la <text:span text:style-name="T1">JVM (Java Virtual Machine)</text:span>.</text:p>
      <text:p text:style-name="Text_20_body">Aquí tienes una propuesta técnica detallada para tu informe, adaptada específicamente a un entorno Java:</text:p>
      <text:p text:style-name="Horizontal_20_Line"/>
      <text:h text:style-name="Heading_20_2" text:outline-level="2">1. Tipo de Sistema</text:h>
      <text:p text:style-name="Text_20_body">Para una aplicación Java moderna, lo ideal es una <text:span text:style-name="T1">Máquina Virtual (VM)</text:span> o un <text:span text:style-name="T1">Contenedor (Docker)</text:span>.</text:p>
      <text:list text:style-name="L14">
        <text:list-item>
          <text:p text:style-name="P27"><text:span text:style-name="T1">Justificación:</text:span> Java es "escribe una vez, ejecuta en cualquier parte", pero la configuración de la JVM y las variables de entorno (<text:span text:style-name="Source_20_Text">JAVA_HOME</text:span>) pueden variar. Una VM con <text:span text:style-name="T1">Ubuntu Server</text:span> garantiza que el entorno de ejecución sea idéntico al de desarrollo, evitando el clásico "en mi ordenador funcionaba".</text:p>
        </text:list-item>
      </text:list>
      <text:h text:style-name="Heading_20_2" text:outline-level="2"><text:soft-page-break/>2. Requisitos de Hardware (Ajustados a Java)</text:h>
      <text:p text:style-name="Text_20_body">Java consume memoria RAM de una forma particular (debido al Heap).</text:p>
      <text:list text:style-name="L15">
        <text:list-item>
          <text:p text:style-name="P28"><text:span text:style-name="T1">CPU:</text:span> Mínimo 2 vCPUs (Java aprovecha muy bien el multihilo).</text:p>
        </text:list-item>
        <text:list-item>
          <text:p text:style-name="P28"><text:span text:style-name="T1">RAM:</text:span> * <text:span text:style-name="T1">Mínimo:</text:span> 2GB (El SO usa 800MB y la JVM necesita al menos 1GB para no sufrir con el Garbage Collector).</text:p>
          <text:list>
            <text:list-item>
              <text:p text:style-name="P28"><text:span text:style-name="T1">Recomendado:</text:span> 4GB (Para que el sistema respire y la base de datos no compita por memoria).</text:p>
            </text:list-item>
          </text:list>
        </text:list-item>
        <text:list-item>
          <text:p text:style-name="P28"><text:span text:style-name="T1">Almacenamiento:</text:span> 15GB - 20GB SSD (Los archivos <text:span text:style-name="Source_20_Text">.jar</text:span> o <text:span text:style-name="Source_20_Text">.war</text:span> son ligeros, pero los logs de Java pueden crecer rápido).</text:p>
        </text:list-item>
      </text:list>
      <text:h text:style-name="Heading_20_2" text:outline-level="2">3. Sistema Operativo Recomendado</text:h>
      <text:list text:style-name="L16">
        <text:list-item>
          <text:p text:style-name="P29"><text:span text:style-name="T1">Distribución:</text:span> <text:span text:style-name="T1">Ubuntu Server 24.04 LTS</text:span>.</text:p>
        </text:list-item>
        <text:list-item>
          <text:p text:style-name="P29"><text:span text:style-name="T1">Motivo:</text:span> Es la distribución con mayor soporte para la <text:span text:style-name="T1">OpenJDK</text:span>. La gestión de servicios con <text:span text:style-name="Source_20_Text">systemd</text:span> permite que tu aplicación Java se reinicie sola si el servidor se apaga.</text:p>
        </text:list-item>
      </text:list>
      <text:h text:style-name="Heading_20_2" text:outline-level="2">4. Instalación del Entorno (Paso a Paso)</text:h>
      <text:p text:style-name="Text_20_body">Alguien que lea tu informe debería poder ejecutar estos comandos:</text:p>
      <text:list text:style-name="L17">
        <text:list-item>
          <text:p text:style-name="P30"><text:span text:style-name="T1">Instalar el JRE/JDK (Java Runtime Environment):</text:span> <text:span text:style-name="Source_20_Text">sudo apt update &amp;&amp; sudo apt install openjdk-17-jdk -y</text:span> <text:span text:style-name="T5">(Ajusta la versión a la que uses: 11, 17 o 21)</text:span>.</text:p>
        </text:list-item>
        <text:list-item>
          <text:p text:style-name="P30"><text:span text:style-name="T1">Verificar instalación:</text:span> <text:span text:style-name="Source_20_Text">java -version</text:span></text:p>
        </text:list-item>
        <text:list-item>
          <text:p text:style-name="P30"><text:span text:style-name="T1">Configurar la Base de Datos (ej. MySQL):</text:span> <text:span text:style-name="Source_20_Text">sudo apt install mysql-server -y</text:span></text:p>
        </text:list-item>
        <text:list-item>
          <text:p text:style-name="P30"><text:span text:style-name="T1">Despliegue del binario:</text:span> Mover el archivo <text:span text:style-name="Source_20_Text">.jar</text:span> generado en tu IDE (IntelliJ/Eclipse) al servidor: <text:span text:style-name="Source_20_Text">scp mi-proyecto.jar usuario@ip-servidor:/opt/myapp/</text:span></text:p>
        </text:list-item>
      </text:list>
      <text:h text:style-name="Heading_20_2" text:outline-level="2">5. Usuarios, Permisos y Estructura</text:h>
      <text:p text:style-name="Text_20_body">En Java es vital no ejecutar como root por seguridad.</text:p>
      <text:list text:style-name="L18">
        <text:list-item>
          <text:p text:style-name="P31"><text:span text:style-name="T1">Usuario:</text:span> <text:span text:style-name="Source_20_Text">java_user</text:span> (sin privilegios de sudo).</text:p>
        </text:list-item>
        <text:list-item>
          <text:p text:style-name="P32">Estructura de carpetas:</text:p>
          <text:list>
            <text:list-item>
              <text:p text:style-name="P31"><text:span text:style-name="Source_20_Text">/opt/myapp/</text:span>: El ejecutable <text:span text:style-name="Source_20_Text">.jar</text:span>.</text:p>
            </text:list-item>
            <text:list-item>
              <text:p text:style-name="P31"><text:span text:style-name="Source_20_Text">/opt/myapp/config/</text:span>: Archivos <text:span text:style-name="Source_20_Text">application.properties</text:span> o <text:span text:style-name="Source_20_Text">yaml</text:span>.</text:p>
            </text:list-item>
            <text:list-item>
              <text:p text:style-name="P31"><text:span text:style-name="Source_20_Text">/var/log/myapp/</text:span>: Logs de la aplicación (usando Log4j o Slf4j).</text:p>
            </text:list-item>
          </text:list>
        </text:list-item>
        <text:list-item>
          <text:p text:style-name="P31"><text:span text:style-name="T1">Permisos:</text:span> <text:span text:style-name="Source_20_Text">chown -R java_user:java_group /opt/myapp</text:span></text:p>
        </text:list-item>
      </text:list>
      <text:h text:style-name="Heading_20_2" text:outline-level="2"><text:soft-page-break/>6. Mantenimiento Básico</text:h>
      <text:list text:style-name="L19">
        <text:list-item>
          <text:p text:style-name="P33"><text:span text:style-name="T1">Actualizaciones:</text:span> Mantener la versión de la JDK parcheada para evitar vulnerabilidades.</text:p>
        </text:list-item>
        <text:list-item>
          <text:p text:style-name="P33"><text:span text:style-name="T1">Monitoreo de Memoria:</text:span> Usar el comando <text:span text:style-name="Source_20_Text">jstat</text:span> o <text:span text:style-name="Source_20_Text">top</text:span> para verificar que la aplicación no tiene fugas de memoria (<text:span text:style-name="T5">Memory Leaks</text:span>).</text:p>
        </text:list-item>
        <text:list-item>
          <text:p text:style-name="P33"><text:span text:style-name="T1">Logs:</text:span> Revisar periódicamente <text:span text:style-name="Source_20_Text">/var/log/myapp/error.log</text:span>.</text:p>
        </text:list-item>
        <text:list-item>
          <text:p text:style-name="P33"><text:span text:style-name="T1">Fallo Crítico:</text:span> Configurar el archivo de servicio de Linux para que haga un <text:span text:style-name="Source_20_Text">Restart=always</text:span>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16:54:24.187278400</meta:creation-date>
    <dc:date>2026-03-19T17:05:33.241539200</dc:date>
    <meta:editing-duration>PT56S</meta:editing-duration>
    <meta:editing-cycles>1</meta:editing-cycles>
    <meta:document-statistic meta:table-count="0" meta:image-count="0" meta:object-count="0" meta:page-count="7" meta:paragraph-count="100" meta:word-count="1429" meta:character-count="8821" meta:non-whitespace-character-count="7550"/>
    <meta:generator>LibreOffice/25.8.3.2$Windows_X86_64 LibreOffice_project/8ca8d55c161d602844f5428fa4b58097424e324e</meta:generator>
  </office:meta>
</office:document-meta>
</file>