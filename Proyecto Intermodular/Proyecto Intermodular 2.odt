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margin-top="0cm" fo:margin-bottom="0.247cm" style:contextual-spacing="false" fo:line-height="115%"/>
    </style:style>
    <style:style style:name="P2" style:family="paragraph" style:parent-style-name="Heading_20_2">
      <style:paragraph-properties fo:margin-top="0cm" fo:margin-bottom="0.247cm" style:contextual-spacing="false" fo:line-height="115%"/>
    </style:style>
    <style:style style:name="P3" style:family="paragraph" style:parent-style-name="Heading_20_3">
      <style:paragraph-properties fo:margin-top="0cm" fo:margin-bottom="0.247cm" style:contextual-spacing="false" fo:line-height="115%"/>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left="0cm" fo:margin-right="0cm" fo:text-indent="0cm" style:auto-text-indent="false"/>
    </style:style>
    <style:style style:name="P8" style:family="paragraph" style:parent-style-name="Preformatted_20_Text">
      <style:paragraph-properties fo:margin-top="0cm" fo:margin-bottom="0.247cm" style:contextual-spacing="false" fo:line-height="115%"/>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text-properties fo:font-weight="bold"/>
    </style:style>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text-properties officeooo:rsid="0023d3c1" officeooo:paragraph-rsid="0023d3c1"/>
    </style:style>
    <style:style style:name="P21" style:family="paragraph" style:parent-style-name="Text_20_body">
      <style:text-properties officeooo:rsid="0023d3c1"/>
    </style:style>
    <style:style style:name="P22" style:family="paragraph" style:parent-style-name="Horizontal_20_Line">
      <style:paragraph-properties fo:margin-top="0cm" fo:margin-bottom="0.247cm" style:contextual-spacing="false" fo:line-height="115%"/>
      <style:text-properties officeooo:rsid="0023d3c1"/>
    </style:style>
    <style:style style:name="P23" style:family="paragraph" style:parent-style-name="Heading_20_2">
      <style:paragraph-properties fo:margin-top="0cm" fo:margin-bottom="0.247cm" style:contextual-spacing="false" fo:line-height="115%"/>
      <style:text-properties officeooo:rsid="0023d3c1"/>
    </style:style>
    <style:style style:name="P24" style:family="paragraph" style:parent-style-name="Heading_20_3">
      <style:paragraph-properties fo:margin-top="0cm" fo:margin-bottom="0.247cm" style:contextual-spacing="false" fo:line-height="115%"/>
      <style:text-properties officeooo:rsid="0023d3c1"/>
    </style:style>
    <style:style style:name="P25" style:family="paragraph" style:parent-style-name="Text_20_body" style:list-style-name="L14">
      <style:text-properties officeooo:rsid="0023d3c1"/>
    </style:style>
    <style:style style:name="P26" style:family="paragraph" style:parent-style-name="Text_20_body">
      <style:paragraph-properties fo:margin-left="0cm" fo:margin-right="0cm" fo:text-indent="0cm" style:auto-text-indent="false"/>
      <style:text-properties officeooo:rsid="0023d3c1"/>
    </style:style>
    <style:style style:name="P27" style:family="paragraph" style:parent-style-name="Preformatted_20_Text">
      <style:paragraph-properties fo:margin-top="0cm" fo:margin-bottom="0.247cm" style:contextual-spacing="false" fo:line-height="115%"/>
      <style:text-properties officeooo:rsid="0023d3c1"/>
    </style:style>
    <style:style style:name="P28" style:family="paragraph" style:parent-style-name="Text_20_body" style:list-style-name="L15">
      <style:text-properties officeooo:rsid="0023d3c1"/>
    </style:style>
    <style:style style:name="P29" style:family="paragraph" style:parent-style-name="Text_20_body" style:list-style-name="L16">
      <style:text-properties officeooo:rsid="0023d3c1"/>
    </style:style>
    <style:style style:name="P30" style:family="paragraph" style:parent-style-name="Text_20_body" style:list-style-name="L17">
      <style:text-properties officeooo:rsid="0023d3c1"/>
    </style:style>
    <style:style style:name="P31" style:family="paragraph" style:parent-style-name="Text_20_body" style:list-style-name="L18">
      <style:text-properties officeooo:rsid="0023d3c1"/>
    </style:style>
    <style:style style:name="P32" style:family="paragraph" style:parent-style-name="Heading_20_4">
      <style:paragraph-properties fo:margin-top="0cm" fo:margin-bottom="0.247cm" style:contextual-spacing="false" fo:line-height="115%"/>
      <style:text-properties officeooo:rsid="0023d3c1"/>
    </style:style>
    <style:style style:name="P33" style:family="paragraph" style:parent-style-name="Text_20_body" style:list-style-name="L19">
      <style:text-properties officeooo:rsid="0023d3c1"/>
    </style:style>
    <style:style style:name="T1" style:family="text">
      <style:text-properties fo:font-weight="bold"/>
    </style:style>
    <style:style style:name="T2" style:family="text">
      <style:text-properties fo:font-style="italic"/>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 una idea brillante! Fusionarlas le da al proyecto una <text:span text:style-name="T1">dimensión integral</text:span>: no solo informas a la persona que necesita ayuda, sino que además ofreces una solución operativa inmediata.</text:p>
      <text:p text:style-name="Text_20_body">Podríamos llamarlo algo así como <text:span text:style-name="T1">"SafeNet: Sistema Integral de Recursos y Gestión de Plazas de Emergencia"</text:span>.</text:p>
      <text:p text:style-name="P1"/>
      <text:h text:style-name="P2" text:outline-level="2">Cómo se estructura esta fusión en Lenguaje de Marcas</text:h>
      <text:p text:style-name="Text_20_body">Para que tu profesor vea que dominas la asignatura, vamos a organizar la información en dos grandes bloques dentro de un mismo sistema de datos:</text:p>
      <text:h text:style-name="P3" text:outline-level="3">1. El modelo de datos (XML)</text:h>
      <text:p text:style-name="Text_20_body">Necesitaremos un archivo XML que sea capaz de almacenar dos tipos de entidades. Aquí tienes un ejemplo de cómo sería la estructura jerárquica:</text:p>
      <text:list text:style-name="L1">
        <text:list-item>
          <text:p text:style-name="P4"><text:span text:style-name="Source_20_Text"><text:span text:style-name="T1">&lt;recursos&gt;</text:span></text:span>: (La parte informativa)</text:p>
          <text:list>
            <text:list-item>
              <text:p text:style-name="P4"><text:span text:style-name="Source_20_Text">asociacion</text:span>: Nombre, contacto, servicios (legal, psicológico, médico).</text:p>
            </text:list-item>
            <text:list-item>
              <text:p text:style-name="P4"><text:span text:style-name="Source_20_Text">puntos_violeta</text:span>: Ubicaciones físicas de ayuda rápida.</text:p>
            </text:list-item>
          </text:list>
        </text:list-item>
        <text:list-item>
          <text:p text:style-name="P4"><text:span text:style-name="Source_20_Text"><text:span text:style-name="T1">&lt;centros_acogida&gt;</text:span></text:span>: (La parte de gestión)</text:p>
          <text:list>
            <text:list-item>
              <text:p text:style-name="P4"><text:span text:style-name="Source_20_Text">id_centro</text:span>: Código único.</text:p>
            </text:list-item>
            <text:list-item>
              <text:p text:style-name="P4"><text:span text:style-name="Source_20_Text">capacidad_total</text:span>: Plazas máximas.</text:p>
            </text:list-item>
            <text:list-item>
              <text:p text:style-name="P4"><text:span text:style-name="Source_20_Text">ocupacion_actual</text:span>: Plazas ocupadas.</text:p>
            </text:list-item>
            <text:list-item>
              <text:p text:style-name="P4"><text:span text:style-name="Source_20_Text">admite_mascotas</text:span>: Un dato social muy importante en estos casos.</text:p>
            </text:list-item>
          </text:list>
        </text:list-item>
      </text:list>
      <text:h text:style-name="P3" text:outline-level="3">2. La Validación (DTD o XML Schema)</text:h>
      <text:p text:style-name="Text_20_body">Aquí es donde demuestras rigor técnico. Definiremos reglas como:</text:p>
      <text:list text:style-name="L2">
        <text:list-item>
          <text:p text:style-name="P5">El campo <text:span text:style-name="Source_20_Text">telefono</text:span> debe tener 9 dígitos.</text:p>
        </text:list-item>
        <text:list-item>
          <text:p text:style-name="P5">El campo <text:span text:style-name="Source_20_Text">disponibilidad</text:span> debe ser un número que nunca supere a <text:span text:style-name="Source_20_Text">capacidad_total</text:span>.</text:p>
        </text:list-item>
        <text:list-item>
          <text:p text:style-name="P5">Ciertos campos deben ser <text:span text:style-name="T1">obligatorios</text:span> por seguridad (como la ubicación GPS o el teléfono 24h).</text:p>
        </text:list-item>
      </text:list>
      <text:h text:style-name="P3" text:outline-level="3">3. La Interfaz (HTML5 + CSS3)</text:h>
      <text:p text:style-name="Text_20_body">Como es un tema sensible, la web debe tener:</text:p>
      <text:list text:style-name="L3">
        <text:list-item>
          <text:p text:style-name="P6"><text:span text:style-name="T1">Botón de pánico:</text:span> Un acceso rápido para cerrar la web o redirigir a una página neutra (como Google) instantáneamente.</text:p>
        </text:list-item>
        <text:list-item>
          <text:p text:style-name="P6"><text:span text:style-name="T1">Diseño "Mobile First":</text:span> La mayoría de las consultas se harán desde un móvil en situaciones críticas.</text:p>
        </text:list-item>
        <text:list-item>
          <text:p text:style-name="P6"><text:span text:style-name="T1">Accesibilidad:</text:span> Colores claros, tipografía legible y etiquetas para lectores de pantalla.</text:p>
        </text:list-item>
      </text:list>
      <text:p text:style-name="P1"/>
      <text:h text:style-name="P2" text:outline-level="2"><text:soft-page-break/>Tu primer ejercicio práctico</text:h>
      <text:p text:style-name="Text_20_body">Para empezar con <text:span text:style-name="T1">Lenguaje de Marcas</text:span>, vamos a diseñar el "corazón" de tu trabajo: el archivo XML. Intenta escribir (o pensar) cómo definirías un <text:span text:style-name="T1">centro de acogida</text:span>.</text:p>
      <text:p text:style-name="Text_20_body">Aquí te dejo una propuesta inicial. ¿Qué otros datos crees que serían vitales para una víctima que busca refugio en ese momento?</text:p>
      <text:p text:style-name="P7">XML</text:p>
      <text:p text:style-name="P8"><text:span text:style-name="Source_20_Text">&lt;centro_acogida id="C-001"&gt;</text:span></text:p>
      <text:p text:style-name="P8"><text:span text:style-name="Source_20_Text"><text:s text:c="4"/>&lt;nombre&gt;Refugio Esperanza&lt;/nombre&gt;</text:span></text:p>
      <text:p text:style-name="P8"><text:span text:style-name="Source_20_Text"><text:s text:c="4"/>&lt;ubicacion&gt;Valencia&lt;/ubicacion&gt;</text:span></text:p>
      <text:p text:style-name="P8"><text:span text:style-name="Source_20_Text"><text:s text:c="4"/>&lt;contacto&gt;900XXXXXX&lt;/contacto&gt;</text:span></text:p>
      <text:p text:style-name="P8"><text:span text:style-name="Source_20_Text"><text:s text:c="4"/>&lt;plazas_libres&gt;4&lt;/plazas_libres&gt;</text:span></text:p>
      <text:p text:style-name="P8"><text:span text:style-name="Source_20_Text"><text:s text:c="4"/>&lt;servicios_adicionales&gt;</text:span></text:p>
      <text:p text:style-name="P8"><text:span text:style-name="Source_20_Text"><text:s text:c="8"/>&lt;servicio&gt;Atención psicológica infantil&lt;/servicio&gt;</text:span></text:p>
      <text:p text:style-name="P8"><text:span text:style-name="Source_20_Text"><text:s text:c="8"/>&lt;servicio&gt;Asesoría jurídica&lt;/servicio&gt;</text:span></text:p>
      <text:p text:style-name="P8"><text:span text:style-name="Source_20_Text"><text:s text:c="4"/>&lt;/servicios_adicionales&gt;</text:span></text:p>
      <text:p text:style-name="P8"><text:span text:style-name="Source_20_Text">&lt;/centro_acogida&gt;</text:span></text:p>
      <text:p text:style-name="Text_20_body">¿Añadimos algún campo más, como por ejemplo si el centro es de "alta seguridad" o si tiene plazas para personas con movilidad reducida?</text:p>
      <text:p text:style-name="P7">Para que el proyecto sea verdaderamente profesional y útil en el mundo real, yo añadiría campos que cubran <text:span text:style-name="T1">necesidades críticas</text:span> que suelen ser barreras para las víctimas.</text:p>
      <text:section text:style-name="Sect1" text:name="model-response-message-contentr_a201125482c8ada2">
        <text:p text:style-name="Text_20_body">En <text:span text:style-name="T1">Lenguaje de Marcas</text:span>, esto se traduce en enriquecer nuestro archivo XML con metadatos específicos. Aquí te propongo los elementos que harían que tu trabajo destaque por su sensibilidad y profundidad:</text:p>
        <text:p text:style-name="P1"/>
        <text:h text:style-name="P2" text:outline-level="2">1. Campos de Accesibilidad y Necesidades Especiales</text:h>
        <text:p text:style-name="Text_20_body">No todas las víctimas tienen las mismas circunstancias. Añadiría estos nodos al XML:</text:p>
        <text:list text:style-name="L4">
          <text:list-item>
            <text:p text:style-name="P9"><text:span text:style-name="Source_20_Text"><text:span text:style-name="T1">&lt;movilidad_reducida&gt;</text:span></text:span>: (Booleano: Sí/No) Para saber si el centro está adaptado.</text:p>
          </text:list-item>
          <text:list-item>
            <text:p text:style-name="P9"><text:span text:style-name="Source_20_Text"><text:span text:style-name="T1">&lt;idiomas_atencion&gt;</text:span></text:span>: Muy importante para inmigrantes que no dominan el español.</text:p>
          </text:list-item>
          <text:list-item>
            <text:p text:style-name="P9"><text:span text:style-name="Source_20_Text"><text:span text:style-name="T1">&lt;admite_menores&gt;</text:span></text:span>: Para madres que huyen con sus hijos (podrías desglosarlo en plazas para adultos y plazas para niños).</text:p>
          </text:list-item>
        </text:list>
        <text:h text:style-name="P2" text:outline-level="2">2. El "Modo Incógnito" (Seguridad Digital)</text:h>
        <text:p text:style-name="Text_20_body">Desde el punto de vista de <text:span text:style-name="T1">Diseño Web (HTML/CSS)</text:span>, añadiría:</text:p>
        <text:list text:style-name="L5">
          <text:list-item>
            <text:p text:style-name="P10"><text:span text:style-name="Source_20_Text"><text:span text:style-name="T1">&lt;boton_salida_rapida&gt;</text:span></text:span>: Un botón persistente en la interfaz que, al pulsarlo, cierra la pestaña y abre una web neutra (como un buscador o una web de noticias).</text:p>
          </text:list-item>
          <text:list-item>
            <text:p text:style-name="P10"><text:soft-page-break/><text:span text:style-name="Source_20_Text"><text:span text:style-name="T1">&lt;aviso_rastreo&gt;</text:span></text:span>: Un pequeño script o aviso sobre cómo borrar el historial de navegación de forma segura.</text:p>
          </text:list-item>
        </text:list>
        <text:h text:style-name="P2" text:outline-level="2">3. Estado de Disponibilidad en Tiempo Real</text:h>
        <text:p text:style-name="Text_20_body">Para que la parte de <text:span text:style-name="T1">Programación</text:span> y <text:span text:style-name="T1">Bases de Datos</text:span> tenga sentido más adelante, el XML debería incluir:</text:p>
        <text:list text:style-name="L6">
          <text:list-item>
            <text:p text:style-name="P11"><text:span text:style-name="Source_20_Text"><text:span text:style-name="T1">&lt;ultima_actualizacion&gt;</text:span></text:span>: Fecha y hora exacta en la que se confirmaron las plazas libres.</text:p>
          </text:list-item>
          <text:list-item>
            <text:p text:style-name="P11"><text:span text:style-name="Source_20_Text"><text:span text:style-name="T1">&lt;nivel_ocupacion&gt;</text:span></text:span>: Un atributo que cambie de color en el CSS (Verde: libre / Naranja: últimas plazas / Rojo: completo).</text:p>
          </text:list-item>
        </text:list>
        <text:p text:style-name="P1"/>
        <text:h text:style-name="P2" text:outline-level="2">Ejemplo de XML "Enriquecido"</text:h>
        <text:p text:style-name="Text_20_body">Así es como se vería un nodo completo con estas ideas:</text:p>
        <text:p text:style-name="P7">XML</text:p>
        <text:p text:style-name="P8"><text:span text:style-name="Source_20_Text">&lt;centro_acogida id="C-001" seguridad="alta"&gt;</text:span></text:p>
        <text:p text:style-name="P8"><text:span text:style-name="Source_20_Text"><text:s text:c="4"/>&lt;nombre&gt;Refugio Esperanza&lt;/nombre&gt;</text:span></text:p>
        <text:p text:style-name="P8"><text:span text:style-name="Source_20_Text"><text:s text:c="4"/>&lt;municipio_oculto&gt;true&lt;/municipio_oculto&gt; &lt;contacto_emergencia&gt;900XXXXXX&lt;/contacto_emergencia&gt;</text:span></text:p>
        <text:p text:style-name="P8"><text:span text:style-name="Source_20_Text"><text:s text:c="4"/></text:span></text:p>
        <text:p text:style-name="P8"><text:span text:style-name="Source_20_Text"><text:s text:c="4"/>&lt;capacidad&gt;</text:span></text:p>
        <text:p text:style-name="P8"><text:span text:style-name="Source_20_Text"><text:s text:c="8"/>&lt;plazas_adultos disponibles="2"&gt;10&lt;/plazas_adultos&gt;</text:span></text:p>
        <text:p text:style-name="P8"><text:span text:style-name="Source_20_Text"><text:s text:c="8"/>&lt;plazas_menores disponibles="3"&gt;8&lt;/plazas_menores&gt;</text:span></text:p>
        <text:p text:style-name="P8"><text:span text:style-name="Source_20_Text"><text:s text:c="4"/>&lt;/capacidad&gt;</text:span></text:p>
        <text:p text:style-name="P8"/>
        <text:p text:style-name="P8"><text:span text:style-name="Source_20_Text"><text:s text:c="4"/>&lt;caracteristicas&gt;</text:span></text:p>
        <text:p text:style-name="P8"><text:span text:style-name="Source_20_Text"><text:s text:c="8"/>&lt;admite_mascotas&gt;si&lt;/admite_mascotas&gt;</text:span></text:p>
        <text:p text:style-name="P8"><text:span text:style-name="Source_20_Text"><text:s text:c="8"/>&lt;accesible_motriz&gt;si&lt;/accesible_motriz&gt;</text:span></text:p>
        <text:p text:style-name="P8"><text:span text:style-name="Source_20_Text"><text:s text:c="8"/>&lt;idiomas&gt;</text:span></text:p>
        <text:p text:style-name="P8"><text:span text:style-name="Source_20_Text"><text:s text:c="12"/>&lt;idioma&gt;Español&lt;/idioma&gt;</text:span></text:p>
        <text:p text:style-name="P8"><text:span text:style-name="Source_20_Text"><text:s text:c="12"/>&lt;idioma&gt;Árabe&lt;/idioma&gt;</text:span></text:p>
        <text:p text:style-name="P8"><text:span text:style-name="Source_20_Text"><text:s text:c="12"/>&lt;idioma&gt;Francés&lt;/idioma&gt;</text:span></text:p>
        <text:p text:style-name="P8"><text:span text:style-name="Source_20_Text"><text:s text:c="8"/>&lt;/idiomas&gt;</text:span></text:p>
        <text:p text:style-name="P8"><text:span text:style-name="Source_20_Text"><text:s text:c="4"/>&lt;/caracteristicas&gt;</text:span></text:p>
        <text:p text:style-name="P8"/>
        <text:p text:style-name="P8"><text:span text:style-name="Source_20_Text"><text:s text:c="4"/>&lt;ultima_verificacion&gt;2024-05-20T10:30:00&lt;/ultima_verificacion&gt;</text:span></text:p>
        <text:p text:style-name="P8"><text:span text:style-name="Source_20_Text">&lt;/centro_acogida&gt;</text:span></text:p>
        <text:p text:style-name="P1"/>
        <text:h text:style-name="P2" text:outline-level="2"><text:soft-page-break/>¿Por qué esto es bueno para tu trabajo intermodular?</text:h>
        <text:list text:style-name="L7">
          <text:list-item>
            <text:p text:style-name="P12"><text:span text:style-name="T1">Para Programación (Java/Python):</text:span> Podrás crear filtros lógicos ("Muéstrame centros que admitan mascotas y tengan 2 plazas libres para niños").</text:p>
          </text:list-item>
          <text:list-item>
            <text:p text:style-name="P12"><text:span text:style-name="T1">Para Bases de Datos (SQL):</text:span> Tendrás una estructura clara para diseñar tablas relacionadas (Centros &lt;-&gt; Servicios &lt;-&gt; Idiomas).</text:p>
          </text:list-item>
          <text:list-item>
            <text:p text:style-name="P12"><text:span text:style-name="T1">Para Entornos de Desarrollo:</text:span> Podrás documentar el caso de uso y las pruebas unitarias de seguridad de los datos.</text:p>
          </text:list-item>
        </text:list>
        <text:p text:style-name="Text_20_body"><text:span text:style-name="T1">¿Qué te parece esta estructura?</text:span> Si te convence, el siguiente paso sería crear el archivo <text:span text:style-name="T1">DTD</text:span> o <text:span text:style-name="T1">Schema</text:span> para obligar a que todos los centros que registres cumplan con este formato. ¿Quieres que veamos cómo se hace esa validación?</text:p>
      </text:section>
      <text:p text:style-name="P7">Perfecto. El siguiente paso lógico en <text:span text:style-name="T1">Lenguaje de Marcas</text:span> es la <text:span text:style-name="T1">validación</text:span>.</text:p>
      <text:section text:style-name="Sect1" text:name="model-response-message-contentr_e274d7cd6124a30c">
        <text:p text:style-name="Text_20_body">Imagina que el XML es la "lista de datos", pero el <text:span text:style-name="T1">XML Schema (XSD)</text:span> es el "manual de instrucciones" o el "contrato". El XSD le dice al ordenador: <text:span text:style-name="T2">"Oye, si el archivo XML no tiene un teléfono de 9 cifras o le falta el campo de plazas libres, no lo aceptes porque es información de emergencia incompleta"</text:span>.</text:p>
        <text:p text:style-name="Text_20_body">En primero de DAM, se suele empezar por el <text:span text:style-name="T1">DTD</text:span> (más sencillo) o el <text:span text:style-name="T1">XSD</text:span> (más potente y actual). Vamos a usar <text:span text:style-name="T1">XSD</text:span>, ya que te permite definir tipos de datos (números, fechas, textos) de forma mucho más precisa.</text:p>
        <text:p text:style-name="P1"/>
        <text:h text:style-name="P2" text:outline-level="2">Creando el "Contrato" (XML Schema - XSD)</text:h>
        <text:p text:style-name="Text_20_body">Aquí tienes una propuesta de cómo validaríamos los datos más importantes que hemos definido. Fíjate en cómo restringimos la información:</text:p>
        <text:p text:style-name="P7">XML</text:p>
        <text:p text:style-name="P8"><text:span text:style-name="Source_20_Text">&lt;?xml version="1.0" encoding="UTF-8"?&gt;</text:span></text:p>
        <text:p text:style-name="P8"><text:span text:style-name="Source_20_Text">&lt;xs:schema xmlns:xs="http://www.w3.org/2001/XMLSchema"&gt;</text:span></text:p>
        <text:p text:style-name="P8"/>
        <text:p text:style-name="P8"><text:span text:style-name="Source_20_Text"><text:s text:c="2"/>&lt;xs:element name="red_refugios"&gt;</text:span></text:p>
        <text:p text:style-name="P8"><text:span text:style-name="Source_20_Text"><text:s text:c="4"/>&lt;xs:complexType&gt;</text:span></text:p>
        <text:p text:style-name="P8"><text:span text:style-name="Source_20_Text"><text:s text:c="6"/>&lt;xs:sequence&gt;</text:span></text:p>
        <text:p text:style-name="P8"><text:span text:style-name="Source_20_Text"><text:s text:c="8"/>&lt;xs:element name="centro_acogida" maxOccurs="unbounded"&gt;</text:span></text:p>
        <text:p text:style-name="P8"><text:span text:style-name="Source_20_Text"><text:s text:c="10"/>&lt;xs:complexType&gt;</text:span></text:p>
        <text:p text:style-name="P8"><text:span text:style-name="Source_20_Text"><text:s text:c="12"/>&lt;xs:sequence&gt;</text:span></text:p>
        <text:p text:style-name="P8"><text:span text:style-name="Source_20_Text"><text:s text:c="14"/>&lt;xs:element name="nombre" type="xs:string"/&gt;</text:span></text:p>
        <text:p text:style-name="P8"><text:span text:style-name="Source_20_Text"><text:s text:c="14"/>&lt;xs:element name="municipio_oculto" type="xs:boolean"/&gt;</text:span></text:p>
        <text:p text:style-name="P8"><text:span text:style-name="Source_20_Text"><text:s text:c="14"/></text:span></text:p>
        <text:p text:style-name="P8"><text:span text:style-name="Source_20_Text"><text:s text:c="14"/>&lt;xs:element name="contacto_emergencia"&gt;</text:span></text:p>
        <text:p text:style-name="P8"><text:soft-page-break/><text:span text:style-name="Source_20_Text"><text:s text:c="16"/>&lt;xs:simpleType&gt;</text:span></text:p>
        <text:p text:style-name="P8"><text:span text:style-name="Source_20_Text"><text:s text:c="18"/>&lt;xs:restriction base="xs:string"&gt;</text:span></text:p>
        <text:p text:style-name="P8"><text:span text:style-name="Source_20_Text"><text:s text:c="20"/>&lt;xs:pattern value="[0-9]{9}"/&gt;</text:span></text:p>
        <text:p text:style-name="P8"><text:span text:style-name="Source_20_Text"><text:s text:c="18"/>&lt;/xs:restriction&gt;</text:span></text:p>
        <text:p text:style-name="P8"><text:span text:style-name="Source_20_Text"><text:s text:c="16"/>&lt;/xs:simpleType&gt;</text:span></text:p>
        <text:p text:style-name="P8"><text:span text:style-name="Source_20_Text"><text:s text:c="14"/>&lt;/xs:element&gt;</text:span></text:p>
        <text:p text:style-name="P8"/>
        <text:p text:style-name="P8"><text:span text:style-name="Source_20_Text"><text:s text:c="14"/>&lt;xs:element name="plazas_libres"&gt;</text:span></text:p>
        <text:p text:style-name="P8"><text:span text:style-name="Source_20_Text"><text:s text:c="16"/>&lt;xs:simpleType&gt;</text:span></text:p>
        <text:p text:style-name="P8"><text:span text:style-name="Source_20_Text"><text:s text:c="18"/>&lt;xs:restriction base="xs:integer"&gt;</text:span></text:p>
        <text:p text:style-name="P8"><text:span text:style-name="Source_20_Text"><text:s text:c="20"/>&lt;xs:minInclusive value="0"/&gt;</text:span></text:p>
        <text:p text:style-name="P8"><text:span text:style-name="Source_20_Text"><text:s text:c="18"/>&lt;/xs:restriction&gt;</text:span></text:p>
        <text:p text:style-name="P8"><text:span text:style-name="Source_20_Text"><text:s text:c="16"/>&lt;/xs:simpleType&gt;</text:span></text:p>
        <text:p text:style-name="P8"><text:span text:style-name="Source_20_Text"><text:s text:c="14"/>&lt;/xs:element&gt;</text:span></text:p>
        <text:p text:style-name="P8"/>
        <text:p text:style-name="P8"><text:span text:style-name="Source_20_Text"><text:s text:c="14"/>&lt;xs:element name="nivel_seguridad"&gt;</text:span></text:p>
        <text:p text:style-name="P8"><text:span text:style-name="Source_20_Text"><text:s text:c="16"/>&lt;xs:simpleType&gt;</text:span></text:p>
        <text:p text:style-name="P8"><text:span text:style-name="Source_20_Text"><text:s text:c="18"/>&lt;xs:restriction base="xs:string"&gt;</text:span></text:p>
        <text:p text:style-name="P8"><text:span text:style-name="Source_20_Text"><text:s text:c="20"/>&lt;xs:enumeration value="alta"/&gt;</text:span></text:p>
        <text:p text:style-name="P8"><text:span text:style-name="Source_20_Text"><text:s text:c="20"/>&lt;xs:enumeration value="media"/&gt;</text:span></text:p>
        <text:p text:style-name="P8"><text:span text:style-name="Source_20_Text"><text:s text:c="20"/>&lt;xs:enumeration value="basica"/&gt;</text:span></text:p>
        <text:p text:style-name="P8"><text:span text:style-name="Source_20_Text"><text:s text:c="18"/>&lt;/xs:restriction&gt;</text:span></text:p>
        <text:p text:style-name="P8"><text:span text:style-name="Source_20_Text"><text:s text:c="16"/>&lt;/xs:simpleType&gt;</text:span></text:p>
        <text:p text:style-name="P8"><text:span text:style-name="Source_20_Text"><text:s text:c="14"/>&lt;/xs:element&gt;</text:span></text:p>
        <text:p text:style-name="P8"/>
        <text:p text:style-name="P8"><text:span text:style-name="Source_20_Text"><text:s text:c="12"/>&lt;/xs:sequence&gt;</text:span></text:p>
        <text:p text:style-name="P8"><text:span text:style-name="Source_20_Text"><text:s text:c="12"/>&lt;xs:attribute name="id" type="xs:ID" use="required"/&gt;</text:span></text:p>
        <text:p text:style-name="P8"><text:span text:style-name="Source_20_Text"><text:s text:c="10"/>&lt;/xs:complexType&gt;</text:span></text:p>
        <text:p text:style-name="P8"><text:span text:style-name="Source_20_Text"><text:s text:c="8"/>&lt;/xs:element&gt;</text:span></text:p>
        <text:p text:style-name="P8"><text:span text:style-name="Source_20_Text"><text:s text:c="6"/>&lt;/xs:sequence&gt;</text:span></text:p>
        <text:p text:style-name="P8"><text:span text:style-name="Source_20_Text"><text:s text:c="4"/>&lt;/xs:complexType&gt;</text:span></text:p>
        <text:p text:style-name="P8"><text:span text:style-name="Source_20_Text"><text:s text:c="2"/>&lt;/xs:element&gt;</text:span></text:p>
        <text:p text:style-name="P8"/>
        <text:p text:style-name="P8"><text:span text:style-name="Source_20_Text">&lt;/xs:schema&gt;</text:span></text:p>
        <text:p text:style-name="P1"/>
        <text:h text:style-name="P2" text:outline-level="2"><text:soft-page-break/>¿Por qué esto es clave para tu nota?</text:h>
        <text:list text:style-name="L8">
          <text:list-item>
            <text:p text:style-name="P13"><text:span text:style-name="T1">Integridad de Datos:</text:span> En una aplicación de violencia de género, un error en un número de teléfono o en el número de plazas puede ser crítico. Con el XSD, aseguras que el sistema no "rompa" por datos mal introducidos.</text:p>
          </text:list-item>
          <text:list-item>
            <text:p text:style-name="P13"><text:span text:style-name="T1">Preparación para Programación:</text:span> Cuando el año que viene (o más adelante este curso) uses <text:span text:style-name="T1">Java</text:span> para leer este XML, el lenguaje te agradecerá que los tipos de datos estén claros (saber que las plazas son <text:span text:style-name="Source_20_Text">int</text:span> y no <text:span text:style-name="Source_20_Text">string</text:span>).</text:p>
          </text:list-item>
          <text:list-item>
            <text:p text:style-name="P13"><text:span text:style-name="T1">Seguridad:</text:span> Al usar <text:span text:style-name="Source_20_Text">xs:enumeration</text:span>, evitas que alguien escriba cualquier cosa en campos críticos como el nivel de seguridad.</text:p>
          </text:list-item>
        </text:list>
        <text:p text:style-name="P1"/>
        <text:h text:style-name="P2" text:outline-level="2">Siguiente paso: La Interfaz (HTML/CSS)</text:h>
        <text:p text:style-name="Text_20_body">Ya tenemos la estructura (XML) y las reglas (XSD). Ahora toca pensar en la <text:span text:style-name="T1">víctima que va a usar esto</text:span>.</text:p>
        <text:p text:style-name="Text_20_body">En un trabajo intermodular, la parte visual debe ser funcional. Para la parte de <text:span text:style-name="T1">HTML/CSS</text:span>, ¿qué te parecería si diseñamos una "tarjeta" de centro de acogida que sea discreta pero clara?</text:p>
        <text:p text:style-name="Text_20_body">Podemos incluir:</text:p>
        <text:list text:style-name="L9">
          <text:list-item>
            <text:p text:style-name="P14">Un diseño que no parezca una "web de policía" a simple vista (por si el agresor mira la pantalla).</text:p>
          </text:list-item>
          <text:list-item>
            <text:p text:style-name="P14">Colores que transmitan calma (azules suaves, verdes, blancos).</text:p>
          </text:list-item>
          <text:list-item>
            <text:p text:style-name="P14">El famoso <text:span text:style-name="T1">Botón de Salida Rápida</text:span>.</text:p>
          </text:list-item>
        </text:list>
        <text:p text:style-name="P15">¿Quieres que intentemos esbozar el código HTML básico para mostrar uno de estos centros?</text:p>
      </text:section>
      <text:p text:style-name="P7">Perfecto! Vamos a diseñar la <text:span text:style-name="T1">interfaz (HTML5)</text:span>.</text:p>
      <text:section text:style-name="Sect1" text:name="model-response-message-contentr_b676eab0a9064e13">
        <text:p text:style-name="Text_20_body">En un proyecto de este tipo, la prioridad es la <text:span text:style-name="T1">usabilidad bajo estrés</text:span> y la <text:span text:style-name="T1">discreción</text:span>. El HTML no solo debe mostrar la información del XML que definimos, sino que debe estar preparado para proteger a la usuaria.</text:p>
        <text:p text:style-name="Text_20_body">Aquí tienes una estructura de ejemplo para la "Ficha de un Centro" y el sistema de seguridad.</text:p>
        <text:h text:style-name="P3" text:outline-level="3">1. El código HTML5 (Estructura)</text:h>
        <text:p text:style-name="P7">HTML</text:p>
        <text:p text:style-name="P8"><text:span text:style-name="Source_20_Text">&lt;!DOCTYPE html&gt;</text:span></text:p>
        <text:p text:style-name="P8"><text:span text:style-name="Source_20_Text">&lt;html lang="es"&gt;</text:span></text:p>
        <text:p text:style-name="P8"><text:span text:style-name="Source_20_Text">&lt;head&gt;</text:span></text:p>
        <text:p text:style-name="P8"><text:span text:style-name="Source_20_Text"><text:s text:c="4"/>&lt;meta charset="UTF-8"&gt;</text:span></text:p>
        <text:p text:style-name="P8"><text:span text:style-name="Source_20_Text"><text:s text:c="4"/>&lt;meta name="viewport" content="width=device-width, initial-scale=1.0"&gt;</text:span></text:p>
        <text:p text:style-name="P8"><text:span text:style-name="Source_20_Text"><text:s text:c="4"/>&lt;title&gt;SafeNet - Recursos de Apoyo&lt;/title&gt;</text:span></text:p>
        <text:p text:style-name="P8"><text:span text:style-name="Source_20_Text"><text:s text:c="4"/>&lt;link rel="stylesheet" href="estilos.css"&gt;</text:span></text:p>
        <text:p text:style-name="P8"><text:soft-page-break/><text:span text:style-name="Source_20_Text">&lt;/head&gt;</text:span></text:p>
        <text:p text:style-name="P8"><text:span text:style-name="Source_20_Text">&lt;body&gt;</text:span></text:p>
        <text:p text:style-name="P8"/>
        <text:p text:style-name="P8"><text:span text:style-name="Source_20_Text"><text:s text:c="4"/>&lt;nav class="navbar"&gt;</text:span></text:p>
        <text:p text:style-name="P8"><text:span text:style-name="Source_20_Text"><text:s text:c="8"/>&lt;div class="logo"&gt;SafeNet&lt;/div&gt;</text:span></text:p>
        <text:p text:style-name="P8"><text:span text:style-name="Source_20_Text"><text:s text:c="8"/>&lt;button onclick="salidaRapida()" class="btn-panico"&gt;SALIDA RÁPIDA (ESC)&lt;/button&gt;</text:span></text:p>
        <text:p text:style-name="P8"><text:span text:style-name="Source_20_Text"><text:s text:c="4"/>&lt;/nav&gt;</text:span></text:p>
        <text:p text:style-name="P8"/>
        <text:p text:style-name="P8"><text:span text:style-name="Source_20_Text"><text:s text:c="4"/>&lt;main class="contenedor"&gt;</text:span></text:p>
        <text:p text:style-name="P8"><text:span text:style-name="Source_20_Text"><text:s text:c="8"/>&lt;h1&gt;Centros de Acogida Disponibles&lt;/h1&gt;</text:span></text:p>
        <text:p text:style-name="P8"><text:span text:style-name="Source_20_Text"><text:s text:c="8"/>&lt;p class="instruccion"&gt;Usa los filtros para encontrar un lugar seguro. La información se actualiza en tiempo real.&lt;/p&gt;</text:span></text:p>
        <text:p text:style-name="P8"/>
        <text:p text:style-name="P8"><text:span text:style-name="Source_20_Text"><text:s text:c="8"/>&lt;article class="tarjeta-centro"&gt;</text:span></text:p>
        <text:p text:style-name="P8"><text:span text:style-name="Source_20_Text"><text:s text:c="12"/>&lt;header&gt;</text:span></text:p>
        <text:p text:style-name="P8"><text:span text:style-name="Source_20_Text"><text:s text:c="16"/>&lt;h2&gt;Refugio Esperanza&lt;/h2&gt;</text:span></text:p>
        <text:p text:style-name="P8"><text:span text:style-name="Source_20_Text"><text:s text:c="16"/>&lt;span class="badge-seguridad"&gt;Alta Seguridad&lt;/span&gt;</text:span></text:p>
        <text:p text:style-name="P8"><text:span text:style-name="Source_20_Text"><text:s text:c="12"/>&lt;/header&gt;</text:span></text:p>
        <text:p text:style-name="P8"><text:span text:style-name="Source_20_Text"><text:s text:c="12"/></text:span></text:p>
        <text:p text:style-name="P8"><text:span text:style-name="Source_20_Text"><text:s text:c="12"/>&lt;div class="info-plazas"&gt;</text:span></text:p>
        <text:p text:style-name="P8"><text:span text:style-name="Source_20_Text"><text:s text:c="16"/>&lt;p&gt;&lt;strong&gt;Plazas Libres:&lt;/strong&gt; &lt;span class="numero"&gt;4&lt;/span&gt;&lt;/p&gt;</text:span></text:p>
        <text:p text:style-name="P8"><text:span text:style-name="Source_20_Text"><text:s text:c="16"/>&lt;div class="barra-ocupacion"&gt;&lt;div class="progreso" style="width: 40%;"&gt;&lt;/div&gt;&lt;/div&gt;</text:span></text:p>
        <text:p text:style-name="P8"><text:span text:style-name="Source_20_Text"><text:s text:c="12"/>&lt;/div&gt;</text:span></text:p>
        <text:p text:style-name="P8"/>
        <text:p text:style-name="P8"><text:span text:style-name="Source_20_Text"><text:s text:c="12"/>&lt;ul class="servicios"&gt;</text:span></text:p>
        <text:p text:style-name="P8"><text:span text:style-name="Source_20_Text"><text:s text:c="16"/>&lt;li&gt;✅ Admite Mascotas&lt;/li&gt;</text:span></text:p>
        <text:p text:style-name="P8"><text:span text:style-name="Source_20_Text"><text:s text:c="16"/>&lt;li&gt;✅ Adaptado Movilidad Reducida&lt;/li&gt;</text:span></text:p>
        <text:p text:style-name="P8"><text:span text:style-name="Source_20_Text"><text:s text:c="16"/>&lt;li&gt;✅ Atención en Árabe y Francés&lt;/li&gt;</text:span></text:p>
        <text:p text:style-name="P8"><text:span text:style-name="Source_20_Text"><text:s text:c="12"/>&lt;/ul&gt;</text:span></text:p>
        <text:p text:style-name="P8"/>
        <text:p text:style-name="P8"><text:span text:style-name="Source_20_Text"><text:s text:c="12"/>&lt;div class="acciones"&gt;</text:span></text:p>
        <text:p text:style-name="P8"><text:span text:style-name="Source_20_Text"><text:s text:c="16"/>&lt;a href="tel:900XXXXXX" class="btn-llamada"&gt;Llamar Ahora&lt;/a&gt;</text:span></text:p>
        <text:p text:style-name="P8"><text:span text:style-name="Source_20_Text"><text:s text:c="16"/>&lt;button class="btn-info"&gt;Ver Ubicación Discreta&lt;/button&gt;</text:span></text:p>
        <text:p text:style-name="P8"><text:span text:style-name="Source_20_Text"><text:s text:c="12"/>&lt;/div&gt;</text:span></text:p>
        <text:p text:style-name="P8"><text:span text:style-name="Source_20_Text"><text:s text:c="12"/></text:span></text:p>
        <text:p text:style-name="P8"><text:soft-page-break/><text:span text:style-name="Source_20_Text"><text:s text:c="12"/>&lt;footer class="actualizacion"&gt;</text:span></text:p>
        <text:p text:style-name="P8"><text:span text:style-name="Source_20_Text"><text:s text:c="16"/>Última verificación: hace 10 minutos</text:span></text:p>
        <text:p text:style-name="P8"><text:span text:style-name="Source_20_Text"><text:s text:c="12"/>&lt;/footer&gt;</text:span></text:p>
        <text:p text:style-name="P8"><text:span text:style-name="Source_20_Text"><text:s text:c="8"/>&lt;/article&gt;</text:span></text:p>
        <text:p text:style-name="P8"><text:span text:style-name="Source_20_Text"><text:s text:c="4"/>&lt;/main&gt;</text:span></text:p>
        <text:p text:style-name="P8"/>
        <text:p text:style-name="P8"><text:span text:style-name="Source_20_Text"><text:s text:c="4"/>&lt;script&gt;</text:span></text:p>
        <text:p text:style-name="P8"><text:span text:style-name="Source_20_Text"><text:s text:c="8"/>// Función de Salida Rápida</text:span></text:p>
        <text:p text:style-name="P8"><text:span text:style-name="Source_20_Text"><text:s text:c="8"/>function salidaRapida() {</text:span></text:p>
        <text:p text:style-name="P8"><text:span text:style-name="Source_20_Text"><text:s text:c="12"/>// Redirige inmediatamente a una web neutra (ej. Wikipedia o Google)</text:span></text:p>
        <text:p text:style-name="P8"><text:span text:style-name="Source_20_Text"><text:s text:c="12"/>window.location.href = "https://www.google.es";</text:span></text:p>
        <text:p text:style-name="P8"><text:span text:style-name="Source_20_Text"><text:s text:c="8"/>}</text:span></text:p>
        <text:p text:style-name="P8"/>
        <text:p text:style-name="P8"><text:span text:style-name="Source_20_Text"><text:s text:c="8"/>// También se activa al pulsar la tecla Escape</text:span></text:p>
        <text:p text:style-name="P8"><text:span text:style-name="Source_20_Text"><text:s text:c="8"/>document.addEventListener('keydown', function(e) {</text:span></text:p>
        <text:p text:style-name="P8"><text:span text:style-name="Source_20_Text"><text:s text:c="12"/>if (e.key === "Escape") {</text:span></text:p>
        <text:p text:style-name="P8"><text:span text:style-name="Source_20_Text"><text:s text:c="16"/>salidaRapida();</text:span></text:p>
        <text:p text:style-name="P8"><text:span text:style-name="Source_20_Text"><text:s text:c="12"/>}</text:span></text:p>
        <text:p text:style-name="P8"><text:span text:style-name="Source_20_Text"><text:s text:c="8"/>});</text:span></text:p>
        <text:p text:style-name="P8"><text:span text:style-name="Source_20_Text"><text:s text:c="4"/>&lt;/script&gt;</text:span></text:p>
        <text:p text:style-name="P8"><text:span text:style-name="Source_20_Text">&lt;/body&gt;</text:span></text:p>
        <text:p text:style-name="P8"><text:span text:style-name="Source_20_Text">&lt;/html&gt;</text:span></text:p>
        <text:h text:style-name="P3" text:outline-level="3">2. Conceptos clave para tu parte de Lenguaje de Marcas:</text:h>
        <text:p text:style-name="Text_20_body">Para que esta parte sea de "sobresaliente" en DAM, debes explicar por qué has tomado estas decisiones técnicas:</text:p>
        <text:list text:style-name="L10">
          <text:list-item>
            <text:p text:style-name="P16"><text:span text:style-name="T1">Accesibilidad (A11y):</text:span> He usado etiquetas semánticas (<text:span text:style-name="Source_20_Text">&lt;article&gt;</text:span>, <text:span text:style-name="Source_20_Text">&lt;nav&gt;</text:span>, <text:span text:style-name="Source_20_Text">&lt;main&gt;</text:span>). Esto es fundamental para que los lectores de pantalla de personas con discapacidad visual funcionen correctamente.</text:p>
          </text:list-item>
          <text:list-item>
            <text:p text:style-name="P16"><text:span text:style-name="T1">Diseño Adaptativo (Responsive):</text:span> La etiqueta <text:span text:style-name="Source_20_Text">&lt;meta name="viewport"&gt;</text:span> asegura que la víctima pueda ver la web perfectamente desde un móvil, que es lo más común en una emergencia.</text:p>
          </text:list-item>
          <text:list-item>
            <text:p text:style-name="P16"><text:span text:style-name="T1">Seguridad por Teclado:</text:span> El script de JavaScript que escucha la tecla "Escape" es un detalle de calidad profesional para la protección de la usuaria.</text:p>
          </text:list-item>
        </text:list>
        <text:p text:style-name="P1"/>
        <text:h text:style-name="P3" text:outline-level="3">¿Cómo seguimos?</text:h>
        <text:p text:style-name="Text_20_body">Ya tienes:</text:p>
        <text:list text:style-name="L11">
          <text:list-item>
            <text:p text:style-name="P17"><text:soft-page-break/><text:span text:style-name="T1">El Tema:</text:span> SafeNet (Gestión de recursos y plazas).</text:p>
          </text:list-item>
          <text:list-item>
            <text:p text:style-name="P17"><text:span text:style-name="T1">La Estructura:</text:span> XML (Datos de los centros).</text:p>
          </text:list-item>
          <text:list-item>
            <text:p text:style-name="P17"><text:span text:style-name="T1">La Validación:</text:span> XSD (Reglas para que los datos sean correctos).</text:p>
          </text:list-item>
          <text:list-item>
            <text:p text:style-name="P17"><text:span text:style-name="T1">La Visualización:</text:span> HTML5 (La interfaz segura).</text:p>
          </text:list-item>
        </text:list>
        <text:p text:style-name="Text_20_body"><text:span text:style-name="T1">¿Quieres que te ayude a crear un poco de CSS para que esta interfaz no sea solo texto y se vea profesional (colores, tarjetas, botón de pánico en rojo, etc.)?</text:span> O si prefieres, podemos dar el salto y ver cómo este tema se conectaría con la siguiente asignatura, por ejemplo, <text:span text:style-name="T1">Bases de Datos (SQL)</text:span> o <text:span text:style-name="T1">Programación</text:span>. ¿Qué te apetece más?</text:p>
      </text:section>
      <text:p text:style-name="P7">¡Perfecto! Vamos a darle ese aspecto visual. El <text:span text:style-name="T1">CSS (Cascading Style Sheets)</text:span> es lo que separa un proyecto "de clase" de una herramienta que parece una aplicación real.</text:p>
      <text:section text:style-name="Sect1" text:name="model-response-message-contentr_4bd6838bfdb8b601">
        <text:p text:style-name="Text_20_body">Para este proyecto, usaremos una paleta de colores que transmita <text:span text:style-name="T1">seguridad y calma</text:span> (azules y blancos), pero con un <text:span text:style-name="T1">contraste claro</text:span> para que sea fácil de leer.</text:p>
        <text:p text:style-name="P1"/>
        <text:h text:style-name="P3" text:outline-level="3">1. El código CSS (estilos.css)</text:h>
        <text:p text:style-name="Text_20_body">Copia este código y guárdalo en un archivo llamado <text:span text:style-name="Source_20_Text">estilos.css</text:span> en la misma carpeta que tu HTML:</text:p>
        <text:p text:style-name="P7">CSS</text:p>
        <text:p text:style-name="P8"><text:span text:style-name="Source_20_Text">/* Configuración General */</text:span></text:p>
        <text:p text:style-name="P8"><text:span text:style-name="Source_20_Text">* {</text:span></text:p>
        <text:p text:style-name="P8"><text:span text:style-name="Source_20_Text"><text:s text:c="4"/>box-sizing: border-box;</text:span></text:p>
        <text:p text:style-name="P8"><text:span text:style-name="Source_20_Text"><text:s text:c="4"/>margin: 0;</text:span></text:p>
        <text:p text:style-name="P8"><text:span text:style-name="Source_20_Text"><text:s text:c="4"/>padding: 0;</text:span></text:p>
        <text:p text:style-name="P8"><text:span text:style-name="Source_20_Text"><text:s text:c="4"/>font-family: 'Segoe UI', Tahoma, Geneva, Verdana, sans-serif;</text:span></text:p>
        <text:p text:style-name="P8"><text:span text:style-name="Source_20_Text">}</text:span></text:p>
        <text:p text:style-name="P8"/>
        <text:p text:style-name="P8"><text:span text:style-name="Source_20_Text">body {</text:span></text:p>
        <text:p text:style-name="P8"><text:span text:style-name="Source_20_Text"><text:s text:c="4"/>background-color: #f0f4f8; /* Un gris azulado muy suave */</text:span></text:p>
        <text:p text:style-name="P8"><text:span text:style-name="Source_20_Text"><text:s text:c="4"/>color: #333;</text:span></text:p>
        <text:p text:style-name="P8"><text:span text:style-name="Source_20_Text"><text:s text:c="4"/>line-height: 1.6;</text:span></text:p>
        <text:p text:style-name="P8"><text:span text:style-name="Source_20_Text">}</text:span></text:p>
        <text:p text:style-name="P8"/>
        <text:p text:style-name="P8"><text:span text:style-name="Source_20_Text">/* Barra de Navegación y Botón de Pánico */</text:span></text:p>
        <text:p text:style-name="P8"><text:span text:style-name="Source_20_Text">.navbar {</text:span></text:p>
        <text:p text:style-name="P8"><text:span text:style-name="Source_20_Text"><text:s text:c="4"/>background-color: #2c3e50;</text:span></text:p>
        <text:p text:style-name="P8"><text:span text:style-name="Source_20_Text"><text:s text:c="4"/>color: white;</text:span></text:p>
        <text:p text:style-name="P8"><text:span text:style-name="Source_20_Text"><text:s text:c="4"/>padding: 1rem 2rem;</text:span></text:p>
        <text:p text:style-name="P8"><text:soft-page-break/><text:span text:style-name="Source_20_Text"><text:s text:c="4"/>display: flex;</text:span></text:p>
        <text:p text:style-name="P8"><text:span text:style-name="Source_20_Text"><text:s text:c="4"/>justify-content: space-between;</text:span></text:p>
        <text:p text:style-name="P8"><text:span text:style-name="Source_20_Text"><text:s text:c="4"/>align-items: center;</text:span></text:p>
        <text:p text:style-name="P8"><text:span text:style-name="Source_20_Text"><text:s text:c="4"/>position: sticky;</text:span></text:p>
        <text:p text:style-name="P8"><text:span text:style-name="Source_20_Text"><text:s text:c="4"/>top: 0;</text:span></text:p>
        <text:p text:style-name="P8"><text:span text:style-name="Source_20_Text"><text:s text:c="4"/>z-index: 1000;</text:span></text:p>
        <text:p text:style-name="P8"><text:span text:style-name="Source_20_Text">}</text:span></text:p>
        <text:p text:style-name="P8"/>
        <text:p text:style-name="P8"><text:span text:style-name="Source_20_Text">.logo {</text:span></text:p>
        <text:p text:style-name="P8"><text:span text:style-name="Source_20_Text"><text:s text:c="4"/>font-weight: bold;</text:span></text:p>
        <text:p text:style-name="P8"><text:span text:style-name="Source_20_Text"><text:s text:c="4"/>font-size: 1.5rem;</text:span></text:p>
        <text:p text:style-name="P8"><text:span text:style-name="Source_20_Text"><text:s text:c="4"/>letter-spacing: 1px;</text:span></text:p>
        <text:p text:style-name="P8"><text:span text:style-name="Source_20_Text">}</text:span></text:p>
        <text:p text:style-name="P8"/>
        <text:p text:style-name="P8"><text:span text:style-name="Source_20_Text">.btn-panico {</text:span></text:p>
        <text:p text:style-name="P8"><text:span text:style-name="Source_20_Text"><text:s text:c="4"/>background-color: #e74c3c; /* Rojo alerta */</text:span></text:p>
        <text:p text:style-name="P8"><text:span text:style-name="Source_20_Text"><text:s text:c="4"/>color: white;</text:span></text:p>
        <text:p text:style-name="P8"><text:span text:style-name="Source_20_Text"><text:s text:c="4"/>border: none;</text:span></text:p>
        <text:p text:style-name="P8"><text:span text:style-name="Source_20_Text"><text:s text:c="4"/>padding: 0.8rem 1.5rem;</text:span></text:p>
        <text:p text:style-name="P8"><text:span text:style-name="Source_20_Text"><text:s text:c="4"/>font-weight: bold;</text:span></text:p>
        <text:p text:style-name="P8"><text:span text:style-name="Source_20_Text"><text:s text:c="4"/>border-radius: 5px;</text:span></text:p>
        <text:p text:style-name="P8"><text:span text:style-name="Source_20_Text"><text:s text:c="4"/>cursor: pointer;</text:span></text:p>
        <text:p text:style-name="P8"><text:span text:style-name="Source_20_Text"><text:s text:c="4"/>transition: background 0.3s;</text:span></text:p>
        <text:p text:style-name="P8"><text:span text:style-name="Source_20_Text">}</text:span></text:p>
        <text:p text:style-name="P8"/>
        <text:p text:style-name="P8"><text:span text:style-name="Source_20_Text">.btn-panico:hover {</text:span></text:p>
        <text:p text:style-name="P8"><text:span text:style-name="Source_20_Text"><text:s text:c="4"/>background-color: #c0392b;</text:span></text:p>
        <text:p text:style-name="P8"><text:span text:style-name="Source_20_Text">}</text:span></text:p>
        <text:p text:style-name="P8"/>
        <text:p text:style-name="P8"><text:span text:style-name="Source_20_Text">/* Contenedor Principal */</text:span></text:p>
        <text:p text:style-name="P8"><text:span text:style-name="Source_20_Text">.contenedor {</text:span></text:p>
        <text:p text:style-name="P8"><text:span text:style-name="Source_20_Text"><text:s text:c="4"/>max-width: 800px;</text:span></text:p>
        <text:p text:style-name="P8"><text:span text:style-name="Source_20_Text"><text:s text:c="4"/>margin: 2rem auto;</text:span></text:p>
        <text:p text:style-name="P8"><text:span text:style-name="Source_20_Text"><text:s text:c="4"/>padding: 0 1rem;</text:span></text:p>
        <text:p text:style-name="P8"><text:span text:style-name="Source_20_Text">}</text:span></text:p>
        <text:p text:style-name="P8"/>
        <text:p text:style-name="P8"><text:soft-page-break/><text:span text:style-name="Source_20_Text">h1 {</text:span></text:p>
        <text:p text:style-name="P8"><text:span text:style-name="Source_20_Text"><text:s text:c="4"/>margin-bottom: 0.5rem;</text:span></text:p>
        <text:p text:style-name="P8"><text:span text:style-name="Source_20_Text"><text:s text:c="4"/>color: #2c3e50;</text:span></text:p>
        <text:p text:style-name="P8"><text:span text:style-name="Source_20_Text">}</text:span></text:p>
        <text:p text:style-name="P8"/>
        <text:p text:style-name="P8"><text:span text:style-name="Source_20_Text">.instruccion {</text:span></text:p>
        <text:p text:style-name="P8"><text:span text:style-name="Source_20_Text"><text:s text:c="4"/>margin-bottom: 2rem;</text:span></text:p>
        <text:p text:style-name="P8"><text:span text:style-name="Source_20_Text"><text:s text:c="4"/>color: #7f8c8d;</text:span></text:p>
        <text:p text:style-name="P8"><text:span text:style-name="Source_20_Text">}</text:span></text:p>
        <text:p text:style-name="P8"/>
        <text:p text:style-name="P8"><text:span text:style-name="Source_20_Text">/* Tarjeta del Centro */</text:span></text:p>
        <text:p text:style-name="P8"><text:span text:style-name="Source_20_Text">.tarjeta-centro {</text:span></text:p>
        <text:p text:style-name="P8"><text:span text:style-name="Source_20_Text"><text:s text:c="4"/>background: white;</text:span></text:p>
        <text:p text:style-name="P8"><text:span text:style-name="Source_20_Text"><text:s text:c="4"/>border-radius: 12px;</text:span></text:p>
        <text:p text:style-name="P8"><text:span text:style-name="Source_20_Text"><text:s text:c="4"/>padding: 1.5rem;</text:span></text:p>
        <text:p text:style-name="P8"><text:span text:style-name="Source_20_Text"><text:s text:c="4"/>box-shadow: 0 4px 6px rgba(0,0,0,0.1);</text:span></text:p>
        <text:p text:style-name="P8"><text:span text:style-name="Source_20_Text"><text:s text:c="4"/>border-left: 8px solid #3498db; /* Azul seguridad */</text:span></text:p>
        <text:p text:style-name="P8"><text:span text:style-name="Source_20_Text">}</text:span></text:p>
        <text:p text:style-name="P8"/>
        <text:p text:style-name="P8"><text:span text:style-name="Source_20_Text">.tarjeta-centro header {</text:span></text:p>
        <text:p text:style-name="P8"><text:span text:style-name="Source_20_Text"><text:s text:c="4"/>display: flex;</text:span></text:p>
        <text:p text:style-name="P8"><text:span text:style-name="Source_20_Text"><text:s text:c="4"/>justify-content: space-between;</text:span></text:p>
        <text:p text:style-name="P8"><text:span text:style-name="Source_20_Text"><text:s text:c="4"/>align-items: center;</text:span></text:p>
        <text:p text:style-name="P8"><text:span text:style-name="Source_20_Text"><text:s text:c="4"/>margin-bottom: 1rem;</text:span></text:p>
        <text:p text:style-name="P8"><text:span text:style-name="Source_20_Text">}</text:span></text:p>
        <text:p text:style-name="P8"/>
        <text:p text:style-name="P8"><text:span text:style-name="Source_20_Text">.badge-seguridad {</text:span></text:p>
        <text:p text:style-name="P8"><text:span text:style-name="Source_20_Text"><text:s text:c="4"/>background-color: #d4edda;</text:span></text:p>
        <text:p text:style-name="P8"><text:span text:style-name="Source_20_Text"><text:s text:c="4"/>color: #155724;</text:span></text:p>
        <text:p text:style-name="P8"><text:span text:style-name="Source_20_Text"><text:s text:c="4"/>padding: 0.3rem 0.8rem;</text:span></text:p>
        <text:p text:style-name="P8"><text:span text:style-name="Source_20_Text"><text:s text:c="4"/>border-radius: 20px;</text:span></text:p>
        <text:p text:style-name="P8"><text:span text:style-name="Source_20_Text"><text:s text:c="4"/>font-size: 0.8rem;</text:span></text:p>
        <text:p text:style-name="P8"><text:span text:style-name="Source_20_Text"><text:s text:c="4"/>font-weight: bold;</text:span></text:p>
        <text:p text:style-name="P8"><text:span text:style-name="Source_20_Text">}</text:span></text:p>
        <text:p text:style-name="P8"/>
        <text:p text:style-name="P8"><text:span text:style-name="Source_20_Text">/* Barra de Ocupación */</text:span></text:p>
        <text:p text:style-name="P8"><text:soft-page-break/><text:span text:style-name="Source_20_Text">.info-plazas {</text:span></text:p>
        <text:p text:style-name="P8"><text:span text:style-name="Source_20_Text"><text:s text:c="4"/>margin: 1.5rem 0;</text:span></text:p>
        <text:p text:style-name="P8"><text:span text:style-name="Source_20_Text">}</text:span></text:p>
        <text:p text:style-name="P8"/>
        <text:p text:style-name="P8"><text:span text:style-name="Source_20_Text">.barra-ocupacion {</text:span></text:p>
        <text:p text:style-name="P8"><text:span text:style-name="Source_20_Text"><text:s text:c="4"/>background-color: #ecf0f1;</text:span></text:p>
        <text:p text:style-name="P8"><text:span text:style-name="Source_20_Text"><text:s text:c="4"/>height: 12px;</text:span></text:p>
        <text:p text:style-name="P8"><text:span text:style-name="Source_20_Text"><text:s text:c="4"/>border-radius: 6px;</text:span></text:p>
        <text:p text:style-name="P8"><text:span text:style-name="Source_20_Text"><text:s text:c="4"/>margin-top: 0.5rem;</text:span></text:p>
        <text:p text:style-name="P8"><text:span text:style-name="Source_20_Text"><text:s text:c="4"/>overflow: hidden;</text:span></text:p>
        <text:p text:style-name="P8"><text:span text:style-name="Source_20_Text">}</text:span></text:p>
        <text:p text:style-name="P8"/>
        <text:p text:style-name="P8"><text:span text:style-name="Source_20_Text">.progreso {</text:span></text:p>
        <text:p text:style-name="P8"><text:span text:style-name="Source_20_Text"><text:s text:c="4"/>background-color: #2ecc71; /* Verde (disponibilidad) */</text:span></text:p>
        <text:p text:style-name="P8"><text:span text:style-name="Source_20_Text"><text:s text:c="4"/>height: 100%;</text:span></text:p>
        <text:p text:style-name="P8"><text:span text:style-name="Source_20_Text">}</text:span></text:p>
        <text:p text:style-name="P8"/>
        <text:p text:style-name="P8"><text:span text:style-name="Source_20_Text">/* Lista de Servicios */</text:span></text:p>
        <text:p text:style-name="P8"><text:span text:style-name="Source_20_Text">.servicios {</text:span></text:p>
        <text:p text:style-name="P8"><text:span text:style-name="Source_20_Text"><text:s text:c="4"/>list-style: none;</text:span></text:p>
        <text:p text:style-name="P8"><text:span text:style-name="Source_20_Text"><text:s text:c="4"/>margin-bottom: 1.5rem;</text:span></text:p>
        <text:p text:style-name="P8"><text:span text:style-name="Source_20_Text"><text:s text:c="4"/>display: grid;</text:span></text:p>
        <text:p text:style-name="P8"><text:span text:style-name="Source_20_Text"><text:s text:c="4"/>grid-template-columns: 1fr 1fr; /* Dos columnas */</text:span></text:p>
        <text:p text:style-name="P8"><text:span text:style-name="Source_20_Text"><text:s text:c="4"/>gap: 0.5rem;</text:span></text:p>
        <text:p text:style-name="P8"><text:span text:style-name="Source_20_Text">}</text:span></text:p>
        <text:p text:style-name="P8"/>
        <text:p text:style-name="P8"><text:span text:style-name="Source_20_Text">/* Botones de Acción */</text:span></text:p>
        <text:p text:style-name="P8"><text:span text:style-name="Source_20_Text">.acciones {</text:span></text:p>
        <text:p text:style-name="P8"><text:span text:style-name="Source_20_Text"><text:s text:c="4"/>display: flex;</text:span></text:p>
        <text:p text:style-name="P8"><text:span text:style-name="Source_20_Text"><text:s text:c="4"/>gap: 1rem;</text:span></text:p>
        <text:p text:style-name="P8"><text:span text:style-name="Source_20_Text">}</text:span></text:p>
        <text:p text:style-name="P8"/>
        <text:p text:style-name="P8"><text:span text:style-name="Source_20_Text">.btn-llamada {</text:span></text:p>
        <text:p text:style-name="P8"><text:span text:style-name="Source_20_Text"><text:s text:c="4"/>flex: 1;</text:span></text:p>
        <text:p text:style-name="P8"><text:span text:style-name="Source_20_Text"><text:s text:c="4"/>background-color: #3498db;</text:span></text:p>
        <text:p text:style-name="P8"><text:span text:style-name="Source_20_Text"><text:s text:c="4"/>color: white;</text:span></text:p>
        <text:p text:style-name="P8"><text:soft-page-break/><text:span text:style-name="Source_20_Text"><text:s text:c="4"/>text-decoration: none;</text:span></text:p>
        <text:p text:style-name="P8"><text:span text:style-name="Source_20_Text"><text:s text:c="4"/>text-align: center;</text:span></text:p>
        <text:p text:style-name="P8"><text:span text:style-name="Source_20_Text"><text:s text:c="4"/>padding: 0.8rem;</text:span></text:p>
        <text:p text:style-name="P8"><text:span text:style-name="Source_20_Text"><text:s text:c="4"/>border-radius: 5px;</text:span></text:p>
        <text:p text:style-name="P8"><text:span text:style-name="Source_20_Text"><text:s text:c="4"/>font-weight: bold;</text:span></text:p>
        <text:p text:style-name="P8"><text:span text:style-name="Source_20_Text">}</text:span></text:p>
        <text:p text:style-name="P8"/>
        <text:p text:style-name="P8"><text:span text:style-name="Source_20_Text">.btn-info {</text:span></text:p>
        <text:p text:style-name="P8"><text:span text:style-name="Source_20_Text"><text:s text:c="4"/>flex: 1;</text:span></text:p>
        <text:p text:style-name="P8"><text:span text:style-name="Source_20_Text"><text:s text:c="4"/>background-color: #ecf0f1;</text:span></text:p>
        <text:p text:style-name="P8"><text:span text:style-name="Source_20_Text"><text:s text:c="4"/>border: 1px solid #bdc3c7;</text:span></text:p>
        <text:p text:style-name="P8"><text:span text:style-name="Source_20_Text"><text:s text:c="4"/>padding: 0.8rem;</text:span></text:p>
        <text:p text:style-name="P8"><text:span text:style-name="Source_20_Text"><text:s text:c="4"/>border-radius: 5px;</text:span></text:p>
        <text:p text:style-name="P8"><text:span text:style-name="Source_20_Text"><text:s text:c="4"/>cursor: pointer;</text:span></text:p>
        <text:p text:style-name="P8"><text:span text:style-name="Source_20_Text">}</text:span></text:p>
        <text:p text:style-name="P8"/>
        <text:p text:style-name="P8"><text:span text:style-name="Source_20_Text">.actualizacion {</text:span></text:p>
        <text:p text:style-name="P8"><text:span text:style-name="Source_20_Text"><text:s text:c="4"/>margin-top: 1.5rem;</text:span></text:p>
        <text:p text:style-name="P8"><text:span text:style-name="Source_20_Text"><text:s text:c="4"/>font-size: 0.8rem;</text:span></text:p>
        <text:p text:style-name="P8"><text:span text:style-name="Source_20_Text"><text:s text:c="4"/>color: #95a5a6;</text:span></text:p>
        <text:p text:style-name="P8"><text:span text:style-name="Source_20_Text"><text:s text:c="4"/>text-align: right;</text:span></text:p>
        <text:p text:style-name="P8"><text:span text:style-name="Source_20_Text">}</text:span></text:p>
        <text:p text:style-name="P1"/>
        <text:h text:style-name="P3" text:outline-level="3">¿Qué hemos logrado aquí para tu trabajo?</text:h>
        <text:list text:style-name="L12">
          <text:list-item>
            <text:p text:style-name="P18"><text:span text:style-name="T1">Identidad Visual:</text:span> El uso de <text:span text:style-name="Source_20_Text">border-left</text:span> azul y sombras <text:span text:style-name="Source_20_Text">box-shadow</text:span> hace que la información parezca organizada y profesional.</text:p>
          </text:list-item>
          <text:list-item>
            <text:p text:style-name="P18"><text:span text:style-name="T1">Jerarquía Visual:</text:span> El botón de pánico destaca sobre todo lo demás para que sea lo primero que se encuentre en caso de necesidad.</text:p>
          </text:list-item>
          <text:list-item>
            <text:p text:style-name="P18"><text:span text:style-name="T1">Diseño Moderno:</text:span> Hemos usado <text:span text:style-name="T1">Flexbox</text:span> y <text:span text:style-name="T1">CSS Grid</text:span>, que son estándares actuales en el desarrollo web que tu profesor de Lenguaje de Marcas querrá ver.</text:p>
          </text:list-item>
        </text:list>
        <text:p text:style-name="P1"/>
        <text:h text:style-name="P3" text:outline-level="3">El siguiente paso: Conexión intermodular</text:h>
        <text:p text:style-name="Text_20_body">Ahora que ya tienes la "cara" del proyecto (HTML/CSS) y la "estructura" (XML/XSD), para el trabajo intermodular tienes que empezar a pensar en las otras asignaturas.</text:p>
        <text:p text:style-name="Text_20_body">De las que tienes este año, ¿cuál te gustaría abordar ahora?</text:p>
        <text:list text:style-name="L13">
          <text:list-item>
            <text:p text:style-name="P19"><text:span text:style-name="T1">Bases de Datos:</text:span> Diseñar las tablas SQL donde se guardarán realmente estos centros.</text:p>
          </text:list-item>
          <text:list-item>
            <text:p text:style-name="P19"><text:soft-page-break/><text:span text:style-name="T1">Programación:</text:span> Crear el código (probablemente Java) que lea el XML o gestione las plazas.</text:p>
          </text:list-item>
          <text:list-item>
            <text:p text:style-name="P19"><text:span text:style-name="T1">Entornos de Desarrollo:</text:span> Hacer el diagrama de casos de uso (qué hace la usuaria, qué hace el administrador del centro).</text:p>
          </text:list-item>
        </text:list>
        <text:p text:style-name="P15">¿Con cuál seguimos?</text:p>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20">BASES DE DATOS Y ENTORNOS</text:p>
      <text:p text:style-name="P20">¡Excelente elección! Conectar <text:span text:style-name="T1">Bases de Datos</text:span> y <text:span text:style-name="T1">Entornos de Desarrollo</text:span> es lo que le da "cerebro" y organización a tu proyecto. En un trabajo intermodular, los profesores buscan ver cómo los datos pasan de un sitio a otro.</text:p>
      <text:section text:style-name="Sect1" text:name="model-response-message-contentr_dd13e80dcdd83882">
        <text:p text:style-name="P21">Vamos por partes:</text:p>
        <text:p text:style-name="P22"/>
        <text:h text:style-name="P23" text:outline-level="2">1. Bases de Datos (BD)</text:h>
        <text:p text:style-name="P21">En <text:span text:style-name="T1">Lenguaje de Marcas</text:span> teníamos un XML. Pero en el mundo real, los datos se guardan en una <text:span text:style-name="T1">Base de Datos Relacional (SQL)</text:span>. Tu trabajo aquí es diseñar las tablas.</text:p>
        <text:h text:style-name="P24" text:outline-level="3">El Modelo Entidad-Relación (E/R)</text:h>
        <text:p text:style-name="P21">Para tu sistema "SafeNet", necesitaríamos al menos tres tablas principales:</text:p>
        <text:list text:style-name="L14">
          <text:list-item>
            <text:p text:style-name="P25"><text:span text:style-name="T1">Tabla </text:span><text:span text:style-name="Source_20_Text"><text:span text:style-name="T1">Centros</text:span></text:span>: Para los datos físicos y de seguridad.</text:p>
          </text:list-item>
          <text:list-item>
            <text:p text:style-name="P25"><text:span text:style-name="T1">Tabla </text:span><text:span text:style-name="Source_20_Text"><text:span text:style-name="T1">Servicios</text:span></text:span>: Una lista de servicios posibles (Psicología, Legal, Mascotas).</text:p>
          </text:list-item>
          <text:list-item>
            <text:p text:style-name="P25"><text:span text:style-name="T1">Tabla </text:span><text:span text:style-name="Source_20_Text"><text:span text:style-name="T1">Centro_Servicios</text:span></text:span>: Una tabla intermedia (relación N:M), ya que un centro tiene muchos servicios y un servicio puede estar en muchos centros.</text:p>
          </text:list-item>
        </text:list>
        <text:h text:style-name="P24" text:outline-level="3">Script SQL básico (SQLite o MySQL)</text:h>
        <text:p text:style-name="P21">Aquí tienes el código para crear la estructura:</text:p>
        <text:p text:style-name="P26">SQL</text:p>
        <text:p text:style-name="P27"><text:span text:style-name="Source_20_Text">CREATE TABLE Centros (</text:span></text:p>
        <text:p text:style-name="P27"><text:span text:style-name="Source_20_Text"><text:s text:c="4"/>id_centro INTEGER PRIMARY KEY AUTOINCREMENT,</text:span></text:p>
        <text:p text:style-name="P27"><text:span text:style-name="Source_20_Text"><text:s text:c="4"/>nombre VARCHAR(100) NOT NULL,</text:span></text:p>
        <text:p text:style-name="P27"><text:span text:style-name="Source_20_Text"><text:s text:c="4"/>municipio VARCHAR(100),</text:span></text:p>
        <text:p text:style-name="P27"><text:span text:style-name="Source_20_Text"><text:s text:c="4"/>telefono VARCHAR(9),</text:span></text:p>
        <text:p text:style-name="P27"><text:span text:style-name="Source_20_Text"><text:s text:c="4"/>plazas_totales INTEGER,</text:span></text:p>
        <text:p text:style-name="P27"><text:span text:style-name="Source_20_Text"><text:s text:c="4"/>plazas_libres INTEGER,</text:span></text:p>
        <text:p text:style-name="P27"><text:span text:style-name="Source_20_Text"><text:s text:c="4"/>nivel_seguridad CHECK (nivel_seguridad IN ('alta', 'media', 'basica'))</text:span></text:p>
        <text:p text:style-name="P27"><text:span text:style-name="Source_20_Text">);</text:span></text:p>
        <text:p text:style-name="P27"/>
        <text:p text:style-name="P27"><text:span text:style-name="Source_20_Text">CREATE TABLE Servicios (</text:span></text:p>
        <text:p text:style-name="P27"><text:span text:style-name="Source_20_Text"><text:s text:c="4"/>id_servicio INTEGER PRIMARY KEY AUTOINCREMENT,</text:span></text:p>
        <text:p text:style-name="P27"><text:span text:style-name="Source_20_Text"><text:s text:c="4"/>nombre_servicio VARCHAR(50) NOT NULL</text:span></text:p>
        <text:p text:style-name="P27"><text:span text:style-name="Source_20_Text">);</text:span></text:p>
        <text:p text:style-name="P27"/>
        <text:p text:style-name="P27"><text:span text:style-name="Source_20_Text">-- Tabla para conectar Centros con sus Servicios</text:span></text:p>
        <text:p text:style-name="P27"><text:soft-page-break/><text:span text:style-name="Source_20_Text">CREATE TABLE Centro_Servicios (</text:span></text:p>
        <text:p text:style-name="P27"><text:span text:style-name="Source_20_Text"><text:s text:c="4"/>id_centro INTEGER,</text:span></text:p>
        <text:p text:style-name="P27"><text:span text:style-name="Source_20_Text"><text:s text:c="4"/>id_servicio INTEGER,</text:span></text:p>
        <text:p text:style-name="P27"><text:span text:style-name="Source_20_Text"><text:s text:c="4"/>PRIMARY KEY (id_centro, id_servicio),</text:span></text:p>
        <text:p text:style-name="P27"><text:span text:style-name="Source_20_Text"><text:s text:c="4"/>FOREIGN KEY (id_centro) REFERENCES Centros(id_centro),</text:span></text:p>
        <text:p text:style-name="P27"><text:span text:style-name="Source_20_Text"><text:s text:c="4"/>FOREIGN KEY (id_servicio) REFERENCES Servicios(id_servicio)</text:span></text:p>
        <text:p text:style-name="P27"><text:span text:style-name="Source_20_Text">);</text:span></text:p>
        <text:p text:style-name="P22"/>
        <text:h text:style-name="P23" text:outline-level="2">2. Entornos de Desarrollo (ED)</text:h>
        <text:p text:style-name="P21">Esta asignatura no trata de programar, sino de <text:span text:style-name="T1">cómo organizas el proyecto</text:span>. Para tu trabajo intermodular, te pedirán diagramas que expliquen el funcionamiento.</text:p>
        <text:h text:style-name="P24" text:outline-level="3">A. Diagrama de Casos de Uso</text:h>
        <text:p text:style-name="P21">Es vital para mostrar quién usa la aplicación. Para SafeNet hay dos actores:</text:p>
        <text:list text:style-name="L15">
          <text:list-item>
            <text:p text:style-name="P28"><text:span text:style-name="T1">Usuaria (Víctima):</text:span> Puede buscar centros, filtrar por servicios y pulsar el botón de pánico.</text:p>
          </text:list-item>
          <text:list-item>
            <text:p text:style-name="P28"><text:span text:style-name="T1">Administrador del Centro:</text:span> Puede actualizar el número de plazas libres y modificar datos de contacto.</text:p>
          </text:list-item>
        </text:list>
        <text:h text:style-name="P24" text:outline-level="3">B. Metodología de trabajo</text:h>
        <text:p text:style-name="P21">En Entornos se estudia cómo trabajar. Podrías mencionar que vas a usar:</text:p>
        <text:list text:style-name="L16">
          <text:list-item>
            <text:p text:style-name="P29"><text:span text:style-name="T1">Git/GitHub:</text:span> Para el control de versiones (imprescindible en DAM).</text:p>
          </text:list-item>
          <text:list-item>
            <text:p text:style-name="P29"><text:span text:style-name="T1">IDE:</text:span> Explicar por qué usas Visual Studio Code (para marcas) o IntelliJ/Eclipse (para Java).</text:p>
          </text:list-item>
          <text:list-item>
            <text:p text:style-name="P29"><text:span text:style-name="T1">Pruebas Unitarias:</text:span> Cómo vas a comprobar que, si un centro tiene 0 plazas, el sistema no permita asignar a nadie más.</text:p>
          </text:list-item>
        </text:list>
        <text:p text:style-name="P22"/>
        <text:h text:style-name="P23" text:outline-level="2">¿Cómo se conecta todo? (El "truco" intermodular)</text:h>
        <text:p text:style-name="P21">Para sacar la máxima nota, debes explicar esta conexión en tu memoria del trabajo:</text:p>
        <text:list text:style-name="L17">
          <text:list-item>
            <text:p text:style-name="P30"><text:span text:style-name="T1">De Marcas a BD:</text:span> El archivo XML que hicimos al principio sirve para <text:span text:style-name="T1">importar o exportar</text:span> los datos de la Base de Datos SQL.</text:p>
          </text:list-item>
          <text:list-item>
            <text:p text:style-name="P30"><text:span text:style-name="T1">De BD a Marcas:</text:span> La información que guardamos en las tablas SQL se "renderiza" en la interfaz HTML que creamos con CSS.</text:p>
          </text:list-item>
          <text:list-item>
            <text:p text:style-name="P30"><text:span text:style-name="T1">De Entornos a todos:</text:span> El diseño de las tablas y el flujo de la web se basa en los diagramas de Casos de Uso que hiciste en Entornos.</text:p>
          </text:list-item>
        </text:list>
        <text:p text:style-name="P22"/>
        <text:h text:style-name="P24" text:outline-level="3">¿Qué quieres hacer ahora?</text:h>
        <text:list text:style-name="L18">
          <text:list-item>
            <text:p text:style-name="P31">¿Quieres que hagamos un <text:span text:style-name="T1">ejemplo de datos (INSERT)</text:span> en SQL para ver cómo se verían los centros en la tabla?</text:p>
          </text:list-item>
          <text:list-item>
            <text:p text:style-name="P31"><text:soft-page-break/>¿O prefieres que pasemos a <text:span text:style-name="T1">Programación</text:span> para ver cómo conectaríamos la base de datos con una pequeña aplicación?</text:p>
          </text:list-item>
        </text:list>
      </text:section>
      <text:p text:style-name="P20">¡Perfecto! Vamos a poblar esa base de datos con información real para que veas cómo "cobran vida" los datos. Esto es fundamental porque, sin datos, no podrías probar si tu código de programación funciona correctamente.</text:p>
      <text:h text:style-name="P24" text:outline-level="3">1. Inserción de Datos en SQL (DML)</text:h>
      <text:p text:style-name="P21">Vamos a insertar un par de centros y servicios, y luego los conectaremos. Esto sería lo que harías en la asignatura de <text:span text:style-name="T1">Bases de Datos</text:span>:</text:p>
      <text:p text:style-name="P26">SQL</text:p>
      <text:p text:style-name="P27"><text:span text:style-name="Source_20_Text">-- 1. Insertar Centros</text:span></text:p>
      <text:p text:style-name="P27"><text:span text:style-name="Source_20_Text">INSERT INTO Centros (nombre, municipio, telefono, plazas_totales, plazas_libres, nivel_seguridad)</text:span></text:p>
      <text:p text:style-name="P27"><text:span text:style-name="Source_20_Text">VALUES ('Refugio Esperanza', 'Valencia', '900123456', 20, 4, 'alta');</text:span></text:p>
      <text:p text:style-name="P27"/>
      <text:p text:style-name="P27"><text:span text:style-name="Source_20_Text">INSERT INTO Centros (nombre, municipio, telefono, plazas_totales, plazas_libres, nivel_seguridad)</text:span></text:p>
      <text:p text:style-name="P27"><text:span text:style-name="Source_20_Text">VALUES ('Centro Aurora', 'Madrid', '900987654', 15, 0, 'media');</text:span></text:p>
      <text:p text:style-name="P27"/>
      <text:p text:style-name="P27"><text:span text:style-name="Source_20_Text">-- 2. Insertar Servicios</text:span></text:p>
      <text:p text:style-name="P27"><text:span text:style-name="Source_20_Text">INSERT INTO Servicios (nombre_servicio) VALUES ('Atención Psicológica');</text:span></text:p>
      <text:p text:style-name="P27"><text:span text:style-name="Source_20_Text">INSERT INTO Servicios (nombre_servicio) VALUES ('Asesoría Jurídica');</text:span></text:p>
      <text:p text:style-name="P27"><text:span text:style-name="Source_20_Text">INSERT INTO Servicios (nombre_servicio) VALUES ('Acepta Mascotas');</text:span></text:p>
      <text:p text:style-name="P27"/>
      <text:p text:style-name="P27"><text:span text:style-name="Source_20_Text">-- 3. Conectar Centros con Servicios (Tabla Intermedia)</text:span></text:p>
      <text:p text:style-name="P27"><text:span text:style-name="Source_20_Text">-- El Refugio Esperanza (ID 1) tiene Psicoterapia (ID 1) y Mascotas (ID 3)</text:span></text:p>
      <text:p text:style-name="P27"><text:span text:style-name="Source_20_Text">INSERT INTO Centro_Servicios (id_centro, id_servicio) VALUES (1, 1);</text:span></text:p>
      <text:p text:style-name="P27"><text:span text:style-name="Source_20_Text">INSERT INTO Centro_Servicios (id_centro, id_servicio) VALUES (1, 3);</text:span></text:p>
      <text:p text:style-name="P27"/>
      <text:p text:style-name="P27"><text:span text:style-name="Source_20_Text">-- El Centro Aurora (ID 2) solo tiene Asesoría Jurídica (ID 2)</text:span></text:p>
      <text:p text:style-name="P27"><text:span text:style-name="Source_20_Text">INSERT INTO Centro_Servicios (id_centro, id_servicio) VALUES (2, 2);</text:span></text:p>
      <text:p text:style-name="P22"/>
      <text:h text:style-name="P24" text:outline-level="3">2. Programación (Java - El corazón del sistema)</text:h>
      <text:p text:style-name="P21">En primero de DAM, la asignatura estrella es <text:span text:style-name="T1">Programación</text:span> (normalmente en Java). Aquí es donde creas la lógica.</text:p>
      <text:p text:style-name="P21">Para tu trabajo intermodular, podrías crear una <text:span text:style-name="T1">clase </text:span><text:span text:style-name="Source_20_Text"><text:span text:style-name="T1">Centro</text:span></text:span> que represente los datos que hemos definido. Esto se llama POJO (<text:span text:style-name="T2">Plain Old Java Object</text:span>).</text:p>
      <text:h text:style-name="P32" text:outline-level="4"><text:soft-page-break/>Ejemplo de la Clase <text:span text:style-name="Source_20_Text">Centro.java</text:span>:</text:h>
      <text:p text:style-name="P26">Java</text:p>
      <text:p text:style-name="P27"><text:span text:style-name="Source_20_Text">public class Centro {</text:span></text:p>
      <text:p text:style-name="P27"><text:span text:style-name="Source_20_Text"><text:s text:c="4"/>private int id;</text:span></text:p>
      <text:p text:style-name="P27"><text:span text:style-name="Source_20_Text"><text:s text:c="4"/>private String nombre;</text:span></text:p>
      <text:p text:style-name="P27"><text:span text:style-name="Source_20_Text"><text:s text:c="4"/>private int plazasLibres;</text:span></text:p>
      <text:p text:style-name="P27"><text:span text:style-name="Source_20_Text"><text:s text:c="4"/>private boolean admiteMascotas;</text:span></text:p>
      <text:p text:style-name="P27"/>
      <text:p text:style-name="P27"><text:span text:style-name="Source_20_Text"><text:s text:c="4"/>// Constructor</text:span></text:p>
      <text:p text:style-name="P27"><text:span text:style-name="Source_20_Text"><text:s text:c="4"/>public Centro(int id, String nombre, int plazasLibres, boolean admiteMascotas) {</text:span></text:p>
      <text:p text:style-name="P27"><text:span text:style-name="Source_20_Text"><text:s text:c="8"/>this.id = id;</text:span></text:p>
      <text:p text:style-name="P27"><text:span text:style-name="Source_20_Text"><text:s text:c="8"/>this.nombre = nombre;</text:span></text:p>
      <text:p text:style-name="P27"><text:span text:style-name="Source_20_Text"><text:s text:c="8"/>this.plazasLibres = plazasLibres;</text:span></text:p>
      <text:p text:style-name="P27"><text:span text:style-name="Source_20_Text"><text:s text:c="8"/>this.admiteMascotas = admiteMascotas;</text:span></text:p>
      <text:p text:style-name="P27"><text:span text:style-name="Source_20_Text"><text:s text:c="4"/>}</text:span></text:p>
      <text:p text:style-name="P27"/>
      <text:p text:style-name="P27"><text:span text:style-name="Source_20_Text"><text:s text:c="4"/>// Método para comprobar disponibilidad</text:span></text:p>
      <text:p text:style-name="P27"><text:span text:style-name="Source_20_Text"><text:s text:c="4"/>public boolean tienePlazas() {</text:span></text:p>
      <text:p text:style-name="P27"><text:span text:style-name="Source_20_Text"><text:s text:c="8"/>return this.plazasLibres &gt; 0;</text:span></text:p>
      <text:p text:style-name="P27"><text:span text:style-name="Source_20_Text"><text:s text:c="4"/>}</text:span></text:p>
      <text:p text:style-name="P27"/>
      <text:p text:style-name="P27"><text:span text:style-name="Source_20_Text"><text:s text:c="4"/>// Método para mostrar información (Útil para la consola o logs)</text:span></text:p>
      <text:p text:style-name="P27"><text:span text:style-name="Source_20_Text"><text:s text:c="4"/>public void mostrarResumen() {</text:span></text:p>
      <text:p text:style-name="P27"><text:span text:style-name="Source_20_Text"><text:s text:c="8"/>System.out.println("Centro: " + nombre + " | Plazas: " + plazasLibres + </text:span></text:p>
      <text:p text:style-name="P27"><text:span text:style-name="Source_20_Text"><text:s text:c="27"/>" | Mascotas: " + (admiteMascotas ? "Sí" : "No"));</text:span></text:p>
      <text:p text:style-name="P27"><text:span text:style-name="Source_20_Text"><text:s text:c="4"/>}</text:span></text:p>
      <text:p text:style-name="P27"><text:span text:style-name="Source_20_Text">}</text:span></text:p>
      <text:h text:style-name="P32" text:outline-level="4">Lógica de Control (El programa principal):</text:h>
      <text:p text:style-name="P21">Imagina un pequeño buscador que use esos objetos. Esto demuestra que sabes manejar <text:span text:style-name="T1">estructuras de control</text:span> (if, for, arrays):</text:p>
      <text:p text:style-name="P26">Java</text:p>
      <text:p text:style-name="P27"><text:span text:style-name="Source_20_Text">public class GestionSafeNet {</text:span></text:p>
      <text:p text:style-name="P27"><text:span text:style-name="Source_20_Text"><text:s text:c="4"/>public static void main(String[] args) {</text:span></text:p>
      <text:p text:style-name="P27"><text:span text:style-name="Source_20_Text"><text:s text:c="8"/>// Creamos una lista de centros (simulando que vienen de la BD)</text:span></text:p>
      <text:p text:style-name="P27"><text:span text:style-name="Source_20_Text"><text:s text:c="8"/>Centro c1 = new Centro(1, "Refugio Esperanza", 4, true);</text:span></text:p>
      <text:p text:style-name="P27"><text:soft-page-break/><text:span text:style-name="Source_20_Text"><text:s text:c="8"/>Centro c2 = new Centro(2, "Centro Aurora", 0, false);</text:span></text:p>
      <text:p text:style-name="P27"/>
      <text:p text:style-name="P27"><text:span text:style-name="Source_20_Text"><text:s text:c="8"/>Centro[] listaCentros = {c1, c2};</text:span></text:p>
      <text:p text:style-name="P27"/>
      <text:p text:style-name="P27"><text:span text:style-name="Source_20_Text"><text:s text:c="8"/>System.out.println("--- BUSCADOR DE CENTROS DISPONIBLES ---");</text:span></text:p>
      <text:p text:style-name="P27"><text:span text:style-name="Source_20_Text"><text:s text:c="8"/></text:span></text:p>
      <text:p text:style-name="P27"><text:span text:style-name="Source_20_Text"><text:s text:c="8"/>for (Centro c : listaCentros) {</text:span></text:p>
      <text:p text:style-name="P27"><text:span text:style-name="Source_20_Text"><text:s text:c="12"/>if (c.tienePlazas()) {</text:span></text:p>
      <text:p text:style-name="P27"><text:span text:style-name="Source_20_Text"><text:s text:c="16"/>c.mostrarResumen();</text:span></text:p>
      <text:p text:style-name="P27"><text:span text:style-name="Source_20_Text"><text:s text:c="12"/>} else {</text:span></text:p>
      <text:p text:style-name="P27"><text:span text:style-name="Source_20_Text"><text:s text:c="16"/>System.out.println("AVISO: El centro " + c.getNombre() + " está completo.");</text:span></text:p>
      <text:p text:style-name="P27"><text:span text:style-name="Source_20_Text"><text:s text:c="12"/>}</text:span></text:p>
      <text:p text:style-name="P27"><text:span text:style-name="Source_20_Text"><text:s text:c="8"/>}</text:span></text:p>
      <text:p text:style-name="P27"><text:span text:style-name="Source_20_Text"><text:s text:c="4"/>}</text:span></text:p>
      <text:p text:style-name="P27"><text:span text:style-name="Source_20_Text">}</text:span></text:p>
      <text:p text:style-name="P22"/>
      <text:h text:style-name="P24" text:outline-level="3">3. El diagrama que une "Entornos" con "Programación"</text:h>
      <text:p text:style-name="P21">Para que entiendas cómo se organiza esto mentalmente, en <text:span text:style-name="T1">Entornos de Desarrollo</text:span> estudiarás el <text:span text:style-name="T1">Diagrama de Clases</text:span>. Este diagrama muestra cómo se estructuran tus objetos antes de escribir una sola línea de código.</text:p>
      <text:h text:style-name="P24" text:outline-level="3">¿Cómo ayuda esto a tu trabajo?</text:h>
      <text:list text:style-name="L19">
        <text:list-item>
          <text:p text:style-name="P33"><text:span text:style-name="T1">En Programación:</text:span> Demuestras que sabes crear clases, métodos y lógica de filtrado.</text:p>
        </text:list-item>
        <text:list-item>
          <text:p text:style-name="P33"><text:span text:style-name="T1">En Bases de Datos:</text:span> Demuestras que sabes extraer esa información para convertirla en objetos de Java.</text:p>
        </text:list-item>
        <text:list-item>
          <text:p text:style-name="P33"><text:span text:style-name="T1">En Lenguaje de Marcas:</text:span> El resultado de tu programa Java podría exportarse a un archivo XML para enviarlo a otra aplicación.</text:p>
        </text:list-item>
      </text:list>
      <text:p text:style-name="P21"><text:span text:style-name="T1">¿Qué te parece?</text:span> Con esto ya tienes una visión global de casi todas las asignaturas. ¿Te gustaría que profundizáramos en alguna parte específica de la programación (como conectar Java con la Base de Datos) o prefieres repasar cómo presentar la memoria del trabaj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2T18:01:25.939468200</meta:creation-date>
    <dc:date>2026-04-13T16:12:20.644213900</dc:date>
    <meta:editing-duration>PT40M5S</meta:editing-duration>
    <meta:editing-cycles>2</meta:editing-cycles>
    <meta:generator>LibreOffice/25.8.5.2$Windows_X86_64 LibreOffice_project/9c8b85f387cc00a89945a79c9e6239f32e450ac2</meta:generator>
    <meta:document-statistic meta:table-count="0" meta:image-count="0" meta:object-count="0" meta:page-count="19" meta:paragraph-count="486" meta:word-count="3251" meta:character-count="24014" meta:non-whitespace-character-count="19462"/>
  </office:meta>
</office:document-meta>
</file>